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80000008ED1CC5314.png" manifest:media-type="image/png"/>
  <manifest:file-entry manifest:full-path="Pictures/10000001000001A4000000BE418F687D.png" manifest:media-type="image/png"/>
  <manifest:file-entry manifest:full-path="Pictures/10000001000001870000004005F05F85.png" manifest:media-type="image/png"/>
  <manifest:file-entry manifest:full-path="Pictures/10000001000001830000014821FA04B3.png" manifest:media-type="image/png"/>
  <manifest:file-entry manifest:full-path="Pictures/10000001000002B5000000F5E40D765D.png" manifest:media-type="image/png"/>
  <manifest:file-entry manifest:full-path="Pictures/1000000100000154000000AB74C911DB.png" manifest:media-type="image/png"/>
  <manifest:file-entry manifest:full-path="Pictures/10000001000003870000019F25817216.png" manifest:media-type="image/png"/>
  <manifest:file-entry manifest:full-path="Pictures/10000001000001540000015850258742.png" manifest:media-type="image/png"/>
  <manifest:file-entry manifest:full-path="Pictures/100000010000043500000301E3429DD4.png" manifest:media-type="image/png"/>
  <manifest:file-entry manifest:full-path="Pictures/100000010000018E00000183C87A9BC6.png" manifest:media-type="image/png"/>
  <manifest:file-entry manifest:full-path="Pictures/10000001000001BE0000012B0EE9DB44.png" manifest:media-type="image/png"/>
  <manifest:file-entry manifest:full-path="Pictures/10000001000000FF000002297D001C4B.png" manifest:media-type="image/png"/>
  <manifest:file-entry manifest:full-path="Pictures/10000001000002B5000000F59447C3E4.png" manifest:media-type="image/png"/>
  <manifest:file-entry manifest:full-path="Pictures/10000001000003E7000002348E2DFB15.png" manifest:media-type="image/png"/>
  <manifest:file-entry manifest:full-path="Pictures/10000001000002520000019D73C130F8.png" manifest:media-type="image/png"/>
  <manifest:file-entry manifest:full-path="Pictures/10000001000003650000032290A0B79F.png" manifest:media-type="image/png"/>
  <manifest:file-entry manifest:full-path="Pictures/10000001000001BE0000012B0A3E2C15.png" manifest:media-type="image/png"/>
  <manifest:file-entry manifest:full-path="Pictures/10000001000001E000000113A4943405.png" manifest:media-type="image/png"/>
  <manifest:file-entry manifest:full-path="Pictures/10000001000001BE00000047B1DE7FBA.png" manifest:media-type="image/png"/>
  <manifest:file-entry manifest:full-path="Pictures/10000001000002E9000001E3278CF33D.png" manifest:media-type="image/png"/>
  <manifest:file-entry manifest:full-path="Pictures/10000001000001740000019A42CB35C1.png" manifest:media-type="image/png"/>
  <manifest:file-entry manifest:full-path="Pictures/1000000100000228000001D364F0D847.png" manifest:media-type="image/png"/>
  <manifest:file-entry manifest:full-path="Pictures/10000001000001F1000000E1D43831DF.png" manifest:media-type="image/png"/>
  <manifest:file-entry manifest:full-path="Pictures/10000001000002C1000001280F3840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0"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1"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3"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4"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6"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7"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29"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2"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3"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4"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5"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6"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7"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3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1"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style:style>
    <style:style style:name="T6" style:family="text">
      <style:text-properties officeooo:rsid="000a31be"/>
    </style:style>
    <style:style style:name="T7" style:family="text">
      <style:text-properties officeooo:rsid="000a336f"/>
    </style:style>
    <style:style style:name="T8" style:family="text">
      <style:text-properties officeooo:rsid="000bf871"/>
    </style:style>
    <style:style style:name="T9" style:family="text">
      <style:text-properties fo:font-weight="normal" officeooo:rsid="000dbcc2"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1"><text:span text:style-name="T1">A set of information is called Data. For every operation of analysis,machine learning,deep learning and vice versa we need data to perform operations.</text:span></text:p>
      <text:p text:style-name="P2"/>
      <text:p text:style-name="P1">How To Store Data:</text:p>
      <text:p text:style-name="P1"/>
      <text:p text:style-name="P1">Data Table:</text:p>
      <text:p text:style-name="P2">We store data in form of tables which is known as <text:span text:style-name="T2">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4"/>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2"> Qualitative</text:span><text:span text:style-name="T2"> Variables </text:span>while which are not divided in any category we call them as <text:span text:style-name="T2">Quantitative Variables.</text:span> Here in the above example gender is qualitative variable while age and salary are quantitative variables.</text:p>
      <text:p text:style-name="P7"/>
      <text:p text:style-name="P7"/>
      <text:p text:style-name="P7"><text:soft-page-break/>A more proper defination of both are as follows:</text:p>
      <text:p text:style-name="P7"/>
      <text:p text:style-name="P7">So continous numeric data like age,salary,height and etc are known as <text:span text:style-name="T2">Quantitative Variables.</text:span></text:p>
      <text:p text:style-name="P8"/>
      <text:p text:style-name="P7">Where as categorical data like gender,genre and etc are known as <text:span text:style-name="T2">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re on the next page:</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
      <text:p text:style-name="P12"/>
      <text:p text:style-name="P13"><draw:frame draw:style-name="fr2" draw:name="Image2" text:anchor-type="char" svg:x="-0.9075in" svg:y="0.0437in" svg:width="4.0689in" svg:height="1.8425in" draw:z-index="1"><draw:image xlink:href="Pictures/10000001000001F1000000E1D43831DF.png" xlink:type="simple" xlink:show="embed" xlink:actuate="onLoad" draw:mime-type="image/png"/></draw:frame></text:p>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3">No.Of Frequency * 100</text:span><text:span text:style-name="T4"><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1">To explain this we will be using a data of monthly expenses.</text:span></text:p>
      <text:p text:style-name="P17">Here u can see we cant calculate the frequency of the data here but we can only plot a simple bar graph which cant show the flow. In short we will use bar graph when we have frequency of data and line graph we will be using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19"><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0"><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Here we can see it showing the flow of trend like the expenses flow from month 1 to month 12 this is the core reason to create a line graph.</text:p>
      <text:p text:style-name="P20"/>
      <text:p text:style-name="P20"/>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Gives:</text:p>
      <text:p text:style-name="P23">To create an o-gives we have to take out cumulative frequencies.</text:p>
      <text:p text:style-name="P23">So now what is cumulative frequencies lets calculate what is it:</text:p>
      <text:p text:style-name="P23"/>
      <text:p text:style-name="P23"><text:span text:style-name="T2">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b it stays the same as 10k and for Feb it will now be 22k (10k of Jan + 12k of Feb) and for march it will now be 42k (10k of Jan + 12k of Feb + 20k of Mar).</text:p>
      <text:p text:style-name="P23"><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Now the line graph that will be plotted on the basis of <draw:frame draw:style-name="fr2" draw:name="Image10" text:anchor-type="char" svg:x="2.3335in" svg:y="0.3244in" svg:width="4.8346in" svg:height="2.7291in" draw:z-index="9"><draw:image xlink:href="Pictures/10000001000003E7000002348E2DFB15.png" xlink:type="simple" xlink:show="embed" xlink:actuate="onLoad" draw:mime-type="image/png"/></draw:frame>cumulative frequencies will be known as O-Gives.</text:p>
      <text:p text:style-name="P24">Which is drawn here→</text:p>
      <text:p text:style-name="P24"/>
      <text:p text:style-name="P20"/>
      <text:p text:style-name="P20"/>
      <text:p text:style-name="P25"/>
      <text:p text:style-name="P26"><text:s text:c="19"/><text:span text:style-name="T5"/></text:p>
      <text:p text:style-name="P27"><text:soft-page-break/><text:span text:style-name="T6">Two Way Table:</text:span></text:p>
      <text:p text:style-name="P28"><text:s/></text:p>
      <text:p text:style-name="P28"><text:span text:style-name="T7">Currently the table we have on the right is a one way table. Lets assume this table is of data of the period of revenue of 4 years like from 2020-2023 now we can break it down as follows because we don’t have sepe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7">ombined data</text:span> <text:span text:style-name="T7">so we will break it down as follows:</text:span></text:p>
      <text:p text:style-name="P28"><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8"/>
      <text:p text:style-name="P28"/>
      <text:p text:style-name="P28"/>
      <text:p text:style-name="P28"/>
      <text:p text:style-name="P28"/>
      <text:p text:style-name="P28"/>
      <text:p text:style-name="P28"/>
      <text:p text:style-name="P28"/>
      <text:p text:style-name="P28"/>
      <text:p text:style-name="P28"><text:span text:style-name="T7">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span></text:p>
      <text:p text:style-name="P28"/>
      <text:p text:style-name="P28"><text:span text:style-name="T7">Now using this data we can create a line graph for each year. </text:span><text:span text:style-name="T8">Or even a bar graph for each year</text:span></text:p>
      <text:p text:style-name="P28"><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8"><text:s text:c="21"/></text:p>
      <text:p text:style-name="P28"/>
      <text:p text:style-name="P28"/>
      <text:p text:style-name="P29"/>
      <text:p text:style-name="P30"><text:soft-page-break/>In 2 way table there is a thing known as <text:span text:style-name="T2">Dot Plot </text:span>its basically a bar graph with dots stacked on each other. To create that we basically need frequency of specific data which fulfill the need.</text:p>
      <text:p text:style-name="P30">Which needs data like this <text:s/>→</text:p>
      <text:p text:style-name="P30">It helps to build understanding for histogram.</text:p>
      <text:p text:style-name="P30"><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0"/>
      <text:p text:style-name="P30"/>
      <text:p text:style-name="P30"/>
      <text:p text:style-name="P30"/>
      <text:p text:style-name="P30"/>
      <text:p text:style-name="P30"/>
      <text:p text:style-name="P30"/>
      <text:p text:style-name="P30"/>
      <text:p text:style-name="P31"><text:tab/><text:tab/><text:tab/>Dot Plot of the dat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Relative Frequency Table:</text:p>
      <text:p text:style-name="P30">A relative frequency table can be made through both one way and two way table but most of the data we see around is two way so we will focus on that</text:p>
      <text:p text:style-name="P30"/>
      <text:p text:style-name="P30"><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0"/>
      <text:p text:style-name="P30"/>
      <text:p text:style-name="P30"/>
      <text:p text:style-name="P30"/>
      <text:p text:style-name="P30"/>
      <text:p text:style-name="P30"/>
      <text:p text:style-name="P30"/>
      <text:p text:style-name="P31"/>
      <text:p text:style-name="P33">(its a two way table because there is dependencies on two things the color and the flower like if someone asks us where is 20 so u will be telling them in red column and rose rows something like that I hope u got my point)</text:p>
      <text:p text:style-name="P33"/>
      <text:p text:style-name="P34">Now lets calculate the column frequency of the data for which we will be calculating the frequency from 100. (<text:span text:style-name="T2">For detailed calculations refer to the notebook we have done calculations there</text:span>)</text:p>
      <text:p text:style-name="P35"><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5">Formula for calculating→ <text:span text:style-name="T3">No. of An Element*100</text:span></text:p>
      <text:p text:style-name="P36"><text:s text:c="30"/><text:span text:style-name="T9">Total Number <text:s text:c="41"/></text:span></text:p>
      <text:p text:style-name="P35">We have calculated the column frequency so if we total the column frequency we will be getting 100% but not for rows. Fortunately we can also calculate row related frequencies.</text:p>
      <text:p text:style-name="P35"/>
      <text:p text:style-name="P37">We do this because in Machine Learning We Mostly need to convert numeric data into 0s and 1</text:p>
      <text:p text:style-name="P37"><text:soft-page-break/></text:p>
      <text:p text:style-name="P38">Joint Distribution:</text:p>
      <text:p text:style-name="P35">A joint distribution table is similar to relative frequency table as it also contains percentage. This table compares two different distributions in a single table.</text:p>
      <text:p text:style-name="P35"><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5"/>
      <text:p text:style-name="P35"><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text:soft-page-break/>Histogram:</text:p>
      <text:p text:style-name="P40">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0">We will be seeing using this data→</text:p>
      <text:p text:style-name="P40"/>
      <text:p text:style-name="P40">This data is incomplete it has multiple rows but for adding this here we are using only this data.</text:p>
      <text:p text:style-name="P40"/>
      <text:p text:style-name="P40"/>
      <text:p text:style-name="P40"/>
      <text:p text:style-name="P40"/>
      <text:p text:style-name="P40"/>
      <text:p text:style-name="P40"/>
      <text:p text:style-name="P40"/>
      <text:p text:style-name="P40">Now for making histogram we will be using x-axis and we will be creating bins just like this:</text:p>
      <text:p text:style-name="P40"><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0"><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0">Now these bins we put the candidate into their desired bins using their age. Just like the image I have attached→</text:p>
      <text:p text:style-name="P40"><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0">The more the number of data in the bins the more tall the histogram becomes</text:p>
      <text:p text:style-name="P40"/>
      <text:p text:style-name="P40"/>
      <text:p text:style-name="P40"/>
      <text:p text:style-name="P40"/>
      <text:p text:style-name="P41">Now lets work on actual data</text:p>
      <text:p text:style-name="P41"><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2">Range = R max-R</text:span><text:span text:style-name="T2">min</text:span></text:p>
      <text:p text:style-name="P41">here max is 24 and min is 3 so range is 21</text:p>
      <text:p text:style-name="P41">For creating bins we usually have to play around like here we can do is divide the range with 6 21/6 = 3.5.</text:p>
      <text:p text:style-name="P41"><text:soft-page-break/>For safe side we will round it of to 4 and the bins we will have is.</text:p>
      <text:p text:style-name="P41">1-5,6-10,11-15,15-20,21-25</text:p>
      <text:p text:style-name="P41"><draw:frame draw:style-name="fr3" draw:name="Image24" text:anchor-type="char" svg:width="6.6929in" svg:height="3.0756in" draw:z-index="23"><draw:image xlink:href="Pictures/10000001000003870000019F2581721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15T16:43:11.875973668</dc:date>
    <meta:editing-duration>PT6M45S</meta:editing-duration>
    <meta:editing-cycles>1</meta:editing-cycles>
    <meta:generator>LibreOffice/26.2.4.2$Linux_X86_64 LibreOffice_project/620$Build-2</meta:generator>
    <meta:document-statistic meta:table-count="2" meta:image-count="24" meta:object-count="0" meta:page-count="13" meta:paragraph-count="96" meta:word-count="1450" meta:character-count="7825" meta:non-whitespace-character-count="6214"/>
  </office:meta>
</office:document-meta>
</file>