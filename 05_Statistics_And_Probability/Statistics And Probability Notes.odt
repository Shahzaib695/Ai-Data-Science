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1000000D9D54EF373.png" manifest:media-type="image/png"/>
  <manifest:file-entry manifest:full-path="Pictures/10000001000002FF000001268F991DC5.png" manifest:media-type="image/png"/>
  <manifest:file-entry manifest:full-path="Pictures/10000001000004930000009185934DB5.png" manifest:media-type="image/png"/>
  <manifest:file-entry manifest:full-path="Pictures/10000001000001FD000001123FC8FC7D.png" manifest:media-type="image/png"/>
  <manifest:file-entry manifest:full-path="Pictures/1000000100000263000001104AFCC9AF.png" manifest:media-type="image/png"/>
  <manifest:file-entry manifest:full-path="Pictures/100000010000021D000000DC3A4D5C6D.png" manifest:media-type="image/png"/>
  <manifest:file-entry manifest:full-path="Pictures/100000010000029F0000006F2C3E3DD1.png" manifest:media-type="image/png"/>
  <manifest:file-entry manifest:full-path="Pictures/10000000000007B40000031EB53FF66C.png" manifest:media-type="image/png"/>
  <manifest:file-entry manifest:full-path="Pictures/1000000100000189000000AAD5641471.png" manifest:media-type="image/png"/>
  <manifest:file-entry manifest:full-path="Pictures/1000000100000189000000AAA23360C0.png" manifest:media-type="image/png"/>
  <manifest:file-entry manifest:full-path="Pictures/10000001000001C100000077A4FCCFA3.png" manifest:media-type="image/png"/>
  <manifest:file-entry manifest:full-path="Pictures/100000010000034D000000DEE1EB3B5E.png" manifest:media-type="image/png"/>
  <manifest:file-entry manifest:full-path="Pictures/100000010000019E00000097248386ED.png" manifest:media-type="image/png"/>
  <manifest:file-entry manifest:full-path="Pictures/100000010000036A000000FD20B6A434.png" manifest:media-type="image/png"/>
  <manifest:file-entry manifest:full-path="Pictures/10000001000000FA0000006996806909.png" manifest:media-type="image/png"/>
  <manifest:file-entry manifest:full-path="Pictures/100000010000024A000000ED743C6D72.png" manifest:media-type="image/png"/>
  <manifest:file-entry manifest:full-path="Pictures/10000001000003B90000004D10452E42.png" manifest:media-type="image/png"/>
  <manifest:file-entry manifest:full-path="Pictures/1000000100000359000001DA60C0BAF2.png" manifest:media-type="image/png"/>
  <manifest:file-entry manifest:full-path="Pictures/10000001000001A100000085A2605EE3.png" manifest:media-type="image/png"/>
  <manifest:file-entry manifest:full-path="Pictures/10000001000002BF00000248F9604F61.png" manifest:media-type="image/png"/>
  <manifest:file-entry manifest:full-path="Pictures/10000001000002C700000103910FC4F7.png" manifest:media-type="image/png"/>
  <manifest:file-entry manifest:full-path="Pictures/10000001000001F1000000E1D43831DF.png" manifest:media-type="image/png"/>
  <manifest:file-entry manifest:full-path="Pictures/1000000100000228000001D364F0D847.png" manifest:media-type="image/png"/>
  <manifest:file-entry manifest:full-path="Pictures/10000001000003060000014642F267C1.png" manifest:media-type="image/png"/>
  <manifest:file-entry manifest:full-path="Pictures/10000001000001740000019A42CB35C1.png" manifest:media-type="image/png"/>
  <manifest:file-entry manifest:full-path="Pictures/10000001000002E9000001E3278CF33D.png" manifest:media-type="image/png"/>
  <manifest:file-entry manifest:full-path="Pictures/10000001000001BE00000047B1DE7FBA.png" manifest:media-type="image/png"/>
  <manifest:file-entry manifest:full-path="Pictures/100000010000032900000123994D5BCD.png" manifest:media-type="image/png"/>
  <manifest:file-entry manifest:full-path="Pictures/10000001000001BE0000012B0A3E2C15.png" manifest:media-type="image/png"/>
  <manifest:file-entry manifest:full-path="Pictures/10000001000002520000019D73C130F8.png" manifest:media-type="image/png"/>
  <manifest:file-entry manifest:full-path="Pictures/10000001000003E7000002348E2DFB15.png" manifest:media-type="image/png"/>
  <manifest:file-entry manifest:full-path="Pictures/1000000100000189000000AACDC91574.png" manifest:media-type="image/png"/>
  <manifest:file-entry manifest:full-path="Pictures/10000001000002B5000000F59447C3E4.png" manifest:media-type="image/png"/>
  <manifest:file-entry manifest:full-path="Pictures/1000000100000263000001109D46B475.png" manifest:media-type="image/png"/>
  <manifest:file-entry manifest:full-path="Pictures/10000001000000FF000002297D001C4B.png" manifest:media-type="image/png"/>
  <manifest:file-entry manifest:full-path="Pictures/10000001000001BE0000012B0EE9DB44.png" manifest:media-type="image/png"/>
  <manifest:file-entry manifest:full-path="Pictures/10000001000002B5000001AE6E05B3FA.png" manifest:media-type="image/png"/>
  <manifest:file-entry manifest:full-path="Pictures/100000010000018E00000183C87A9BC6.png" manifest:media-type="image/png"/>
  <manifest:file-entry manifest:full-path="Pictures/10000001000002A0000000DE78D62667.png" manifest:media-type="image/png"/>
  <manifest:file-entry manifest:full-path="Pictures/1000000100000301000000902ADBB0B1.png" manifest:media-type="image/png"/>
  <manifest:file-entry manifest:full-path="Pictures/100000010000043500000301E3429DD4.png" manifest:media-type="image/png"/>
  <manifest:file-entry manifest:full-path="Pictures/10000001000000E00000008B852113A3.png" manifest:media-type="image/png"/>
  <manifest:file-entry manifest:full-path="Pictures/10000001000001540000015850258742.png" manifest:media-type="image/png"/>
  <manifest:file-entry manifest:full-path="Pictures/100000010000029B00000213C54AEC8B.png" manifest:media-type="image/png"/>
  <manifest:file-entry manifest:full-path="Pictures/10000001000003090000016DCF9C16F4.png" manifest:media-type="image/png"/>
  <manifest:file-entry manifest:full-path="Pictures/10000001000001E000000113A4943405.png" manifest:media-type="image/png"/>
  <manifest:file-entry manifest:full-path="Pictures/10000001000003870000019F25817216.png" manifest:media-type="image/png"/>
  <manifest:file-entry manifest:full-path="Pictures/10000001000002C1000001280F38401E.png" manifest:media-type="image/png"/>
  <manifest:file-entry manifest:full-path="Pictures/1000000100000154000000AB74C911DB.png" manifest:media-type="image/png"/>
  <manifest:file-entry manifest:full-path="Pictures/10000001000002B5000000F5E40D765D.png" manifest:media-type="image/png"/>
  <manifest:file-entry manifest:full-path="Pictures/1000000100000279000001502246A8A2.png" manifest:media-type="image/png"/>
  <manifest:file-entry manifest:full-path="Pictures/10000001000001830000014821FA04B3.png" manifest:media-type="image/png"/>
  <manifest:file-entry manifest:full-path="Pictures/10000001000001870000004005F05F85.png" manifest:media-type="image/png"/>
  <manifest:file-entry manifest:full-path="Pictures/10000001000001A4000000BE418F687D.png" manifest:media-type="image/png"/>
  <manifest:file-entry manifest:full-path="Pictures/10000001000003680000008ED1CC5314.png" manifest:media-type="image/png"/>
  <manifest:file-entry manifest:full-path="Pictures/10000001000001DA000000814A583CCA.png" manifest:media-type="image/png"/>
  <manifest:file-entry manifest:full-path="Pictures/10000001000003650000032290A0B79F.png" manifest:media-type="image/png"/>
  <manifest:file-entry manifest:full-path="Pictures/10000001000002C50000008AAE9322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normal" officeooo:rsid="0005834e" officeooo:paragraph-rsid="003b42de" style:font-size-asian="16pt" style:font-weight-asian="normal" style:font-size-complex="16pt" style:font-weight-complex="normal"/>
    </style:style>
    <style:style style:name="P20"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1"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3"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4"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6"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7"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9"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3"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4"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8"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4"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5" style:family="paragraph" style:parent-style-name="Standard">
      <style:paragraph-properties fo:text-align="left" style:justify-single-word="false"/>
      <style:text-properties officeooo:paragraph-rsid="0012bc0b"/>
    </style:style>
    <style:style style:name="P46"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7"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8"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5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1"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2"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3"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4"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6"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9"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2"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3"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4"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5"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6"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7"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9"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2"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2236e5" style:font-size-asian="16pt" style:font-weight-asian="bold" style:font-size-complex="16pt" style:font-weight-complex="bold"/>
    </style:style>
    <style:style style:name="P7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2236e5" style:font-size-asian="16pt" style:font-weight-asian="normal" style:font-size-complex="16pt" style:font-weight-complex="normal"/>
    </style:style>
    <style:style style:name="P75"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bcfd" officeooo:paragraph-rsid="001dbcfd" style:font-size-asian="16pt" style:font-weight-asian="normal" style:font-size-complex="16pt" style:font-weight-complex="normal"/>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8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8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P8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68a94" style:font-size-asian="16pt" style:font-weight-asian="bold" style:font-size-complex="16pt" style:font-weight-complex="bold"/>
    </style:style>
    <style:style style:name="P85"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bold" officeooo:rsid="0020e28b" officeooo:paragraph-rsid="00268a94" style:font-size-asian="16pt" style:font-weight-asian="bold" style:font-size-complex="16pt" style:font-weight-complex="bold"/>
    </style:style>
    <style:style style:name="P86"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268a94" officeooo:paragraph-rsid="00268a94" style:font-size-asian="22pt" style:font-weight-asian="bold" style:font-size-complex="22pt" style:font-weight-complex="bold"/>
    </style:style>
    <style:style style:name="P87"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268a94" officeooo:paragraph-rsid="00268a94" style:font-size-asian="16pt" style:font-weight-asian="bold" style:font-size-complex="16pt" style:font-weight-complex="bold"/>
    </style:style>
    <style:style style:name="P8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68a94" officeooo:paragraph-rsid="00268a94" style:font-size-asian="16pt" style:font-weight-asian="normal" style:font-size-complex="16pt" style:font-weight-complex="normal"/>
    </style:style>
    <style:style style:name="P8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864f8" officeooo:paragraph-rsid="002864f8" style:font-size-asian="16pt" style:font-weight-asian="bold" style:font-size-complex="16pt" style:font-weight-complex="bold"/>
    </style:style>
    <style:style style:name="P9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864f8" officeooo:paragraph-rsid="002864f8" style:font-size-asian="16pt" style:font-weight-asian="normal" style:font-size-complex="16pt" style:font-weight-complex="normal"/>
    </style:style>
    <style:style style:name="P91"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normal" officeooo:rsid="002864f8" officeooo:paragraph-rsid="002864f8" style:font-size-asian="16pt" style:font-weight-asian="normal" style:font-size-complex="16pt" style:font-weight-complex="normal"/>
    </style:style>
    <style:style style:name="P92" style:family="paragraph" style:parent-style-name="Standard">
      <style:paragraph-properties fo:text-align="left" style:justify-single-word="false" style:writing-mode="lr-tb" style:writing-mode-automatic="false"/>
      <style:text-properties officeooo:paragraph-rsid="002864f8"/>
    </style:style>
    <style:style style:name="P9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95bae" officeooo:paragraph-rsid="00295bae" style:font-size-asian="16pt" style:font-weight-asian="normal" style:font-size-complex="16pt" style:font-weight-complex="normal"/>
    </style:style>
    <style:style style:name="P9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a42db" officeooo:paragraph-rsid="002a42db" style:font-size-asian="16pt" style:font-weight-asian="normal" style:font-size-complex="16pt" style:font-weight-complex="normal"/>
    </style:style>
    <style:style style:name="P95"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c20b1" style:font-size-asian="16pt" style:font-weight-asian="bold" style:font-size-complex="16pt" style:font-weight-complex="bold"/>
    </style:style>
    <style:style style:name="P9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a42db" style:font-size-asian="16pt" style:font-weight-asian="bold" style:font-size-complex="16pt" style:font-weight-complex="bold"/>
    </style:style>
    <style:style style:name="P9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dbc7d" officeooo:paragraph-rsid="002dbc7d" style:font-size-asian="16pt" style:font-weight-asian="bold" style:font-size-complex="16pt" style:font-weight-complex="bold"/>
    </style:style>
    <style:style style:name="P9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dbc7d" officeooo:paragraph-rsid="002dbc7d" style:font-size-asian="16pt" style:font-weight-asian="normal" style:font-size-complex="16pt" style:font-weight-complex="normal"/>
    </style:style>
    <style:style style:name="P9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100"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10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8b0c4" officeooo:paragraph-rsid="0038b0c4" style:font-size-asian="16pt" style:font-weight-asian="normal" style:font-size-complex="16pt" style:font-weight-complex="normal"/>
    </style:style>
    <style:style style:name="P10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fa427" officeooo:paragraph-rsid="002fa427" style:font-size-asian="16pt" style:font-weight-asian="bold" style:font-size-complex="16pt" style:font-weight-complex="bold"/>
    </style:style>
    <style:style style:name="P10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4"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5"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0067d" officeooo:paragraph-rsid="0030067d" style:font-size-asian="16pt" style:font-weight-asian="bold" style:font-size-complex="16pt" style:font-weight-complex="bold"/>
    </style:style>
    <style:style style:name="P10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1ce57" officeooo:paragraph-rsid="0031ce57" style:font-size-asian="16pt" style:font-weight-asian="normal" style:font-size-complex="16pt" style:font-weight-complex="normal"/>
    </style:style>
    <style:style style:name="P10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1ce57" officeooo:paragraph-rsid="0031ce57" style:font-size-asian="16pt" style:font-weight-asian="bold" style:font-size-complex="16pt" style:font-weight-complex="bold"/>
    </style:style>
    <style:style style:name="P11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4829" style:font-size-asian="16pt" style:font-weight-asian="normal" style:font-size-complex="16pt" style:font-weight-complex="normal"/>
    </style:style>
    <style:style style:name="P11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4829" style:font-size-asian="16pt" style:font-weight-asian="bold" style:font-size-complex="16pt" style:font-weight-complex="bold"/>
    </style:style>
    <style:style style:name="P11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ab49" style:font-size-asian="16pt" style:font-weight-asian="bold" style:font-size-complex="16pt" style:font-weight-complex="bold"/>
    </style:style>
    <style:style style:name="P11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ab49" style:font-size-asian="16pt" style:font-weight-asian="normal" style:font-size-complex="16pt" style:font-weight-complex="normal"/>
    </style:style>
    <style:style style:name="P11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ab49" officeooo:paragraph-rsid="0032ab49" style:font-size-asian="16pt" style:font-weight-asian="normal" style:font-size-complex="16pt" style:font-weight-complex="normal"/>
    </style:style>
    <style:style style:name="P116" style:family="paragraph" style:parent-style-name="Standard" style:list-style-name="L4">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43473" officeooo:paragraph-rsid="00343473" style:font-size-asian="16pt" style:font-weight-asian="normal" style:font-size-complex="16pt" style:font-weight-complex="normal"/>
    </style:style>
    <style:style style:name="P11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43473" officeooo:paragraph-rsid="00343473" style:font-size-asian="16pt" style:font-weight-asian="bold" style:font-size-complex="16pt" style:font-weight-complex="bold"/>
    </style:style>
    <style:style style:name="P11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5b783" officeooo:paragraph-rsid="0035b783" style:font-size-asian="16pt" style:font-weight-asian="normal" style:font-size-complex="16pt" style:font-weight-complex="normal"/>
    </style:style>
    <style:style style:name="P120" style:family="paragraph" style:parent-style-name="Standard">
      <style:paragraph-properties fo:text-align="center"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1"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24829" officeooo:paragraph-rsid="00324829" fo:background-color="transparent" style:font-size-asian="16pt" style:font-weight-asian="bold" style:font-size-complex="16pt" style:font-weight-complex="bold"/>
    </style:style>
    <style:style style:name="P12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6a212" style:font-size-asian="16pt" style:font-weight-asian="normal" style:font-size-complex="16pt" style:font-weight-complex="normal"/>
    </style:style>
    <style:style style:name="P12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7321e" style:font-size-asian="16pt" style:font-weight-asian="normal" style:font-size-complex="16pt" style:font-weight-complex="normal"/>
    </style:style>
    <style:style style:name="P12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321e" officeooo:paragraph-rsid="0037321e" style:font-size-asian="16pt" style:font-weight-asian="normal" style:font-size-complex="16pt" style:font-weight-complex="normal"/>
    </style:style>
    <style:style style:name="P12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ce25" officeooo:paragraph-rsid="0037ce25" style:font-size-asian="16pt" style:font-weight-asian="normal" style:font-size-complex="16pt" style:font-weight-complex="normal"/>
    </style:style>
    <style:style style:name="P127"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67f8f" officeooo:paragraph-rsid="00367f8f" fo:background-color="transparent" style:font-size-asian="16pt" style:font-weight-asian="bold" style:font-size-complex="16pt" style:font-weight-complex="bold"/>
    </style:style>
    <style:style style:name="P128"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f56af" officeooo:paragraph-rsid="003f56af" fo:background-color="transparent" style:font-size-asian="16pt" style:font-weight-asian="bold" style:font-size-complex="16pt" style:font-weight-complex="bold"/>
    </style:style>
    <style:style style:name="P129" style:family="paragraph" style:parent-style-name="Standard">
      <style:paragraph-properties fo:text-align="left" style:justify-single-word="false" style:writing-mode="lr-tb" style:writing-mode-automatic="false"/>
      <style:text-properties officeooo:paragraph-rsid="003f56af"/>
    </style:style>
    <style:style style:name="P13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f56af" officeooo:paragraph-rsid="003f56af" style:font-size-asian="16pt" style:font-weight-asian="normal" style:font-size-complex="16pt" style:font-weight-complex="normal"/>
    </style:style>
    <style:style style:name="P13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f56af" officeooo:paragraph-rsid="003f56af" style:font-size-asian="16pt" style:font-weight-asian="bold" style:font-size-complex="16pt" style:font-weight-complex="bold"/>
    </style:style>
    <style:style style:name="P13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ff66f" officeooo:paragraph-rsid="003ff66f" style:font-size-asian="16pt" style:font-weight-asian="normal" style:font-size-complex="16pt" style:font-weight-complex="normal"/>
    </style:style>
    <style:style style:name="P13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ff66f" officeooo:paragraph-rsid="003ff66f" style:font-size-asian="16pt" style:font-weight-asian="bold" style:font-size-complex="16pt" style:font-weight-complex="bold"/>
    </style:style>
    <style:style style:name="P13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1c578" officeooo:paragraph-rsid="0041c578" style:font-size-asian="16pt" style:font-weight-asian="bold" style:font-size-complex="16pt" style:font-weight-complex="bold"/>
    </style:style>
    <style:style style:name="P13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21c54" officeooo:paragraph-rsid="00421c54" style:font-size-asian="16pt" style:font-weight-asian="normal" style:font-size-complex="16pt" style:font-weight-complex="normal"/>
    </style:style>
    <style:style style:name="P136"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44b973" officeooo:paragraph-rsid="0044b973" style:font-size-asian="22pt" style:font-weight-asian="bold" style:font-size-complex="22pt" style:font-weight-complex="bold"/>
    </style:style>
    <style:style style:name="P13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4b973" officeooo:paragraph-rsid="0044b973" style:font-size-asian="16pt" style:font-weight-asian="normal" style:font-size-complex="16pt" style:font-weight-complex="normal"/>
    </style:style>
    <style:style style:name="P138"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44b973" officeooo:paragraph-rsid="0044b973" style:font-size-asian="16pt" style:font-weight-asian="bold" style:font-size-complex="16pt" style:font-weight-complex="bold"/>
    </style:style>
    <style:style style:name="P13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4b973" officeooo:paragraph-rsid="0044b973" style:font-size-asian="16pt" style:font-weight-asian="bold" style:font-size-complex="16pt" style:font-weight-complex="bold"/>
    </style:style>
    <style:style style:name="P14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582d9" officeooo:paragraph-rsid="004582d9" style:font-size-asian="16pt" style:font-weight-asian="normal" style:font-size-complex="16pt" style:font-weight-complex="normal"/>
    </style:style>
    <style:style style:name="P14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582d9" officeooo:paragraph-rsid="004582d9" style:font-size-asian="16pt" style:font-weight-asian="bold" style:font-size-complex="16pt" style:font-weight-complex="bold"/>
    </style:style>
    <style:style style:name="P142" style:family="paragraph" style:parent-style-name="Standard">
      <style:paragraph-properties fo:text-align="center" style:justify-single-word="false" style:writing-mode="lr-tb" style:writing-mode-automatic="false"/>
      <style:text-properties style:font-name="Comic Relief" fo:font-size="22pt" style:text-underline-style="none" fo:font-weight="bold" officeooo:rsid="004582d9" officeooo:paragraph-rsid="004582d9" style:font-size-asian="22pt" style:font-weight-asian="bold" style:font-size-complex="22pt" style:font-weight-complex="bold"/>
    </style:style>
    <style:style style:name="P143" style:family="paragraph" style:parent-style-name="Standard">
      <style:paragraph-properties fo:text-align="left" style:justify-single-word="false" style:writing-mode="lr-tb" style:writing-mode-automatic="false"/>
      <style:text-properties style:font-name="Comic Relief" fo:font-size="22pt" style:text-underline-style="none" fo:font-weight="bold" officeooo:rsid="004582d9" officeooo:paragraph-rsid="004582d9" style:font-size-asian="22pt" style:font-weight-asian="bold" style:font-size-complex="22pt" style:font-weight-complex="bold"/>
    </style:style>
    <style:style style:name="T1" style:family="text">
      <style:text-properties fo:font-weight="bold" style:font-weight-asian="bold" style:font-weight-complex="bold"/>
    </style:style>
    <style:style style:name="T2" style:family="text">
      <style:text-properties officeooo:rsid="003b42de"/>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10ffc6"/>
    </style:style>
    <style:style style:name="T7" style:family="text">
      <style:text-properties style:text-underline-style="none"/>
    </style:style>
    <style:style style:name="T8" style:family="text">
      <style:text-properties officeooo:rsid="000a31be"/>
    </style:style>
    <style:style style:name="T9" style:family="text">
      <style:text-properties officeooo:rsid="000a336f"/>
    </style:style>
    <style:style style:name="T10" style:family="text">
      <style:text-properties officeooo:rsid="000bf871"/>
    </style:style>
    <style:style style:name="T11" style:family="text">
      <style:text-properties fo:font-weight="normal" officeooo:rsid="000dbcc2" style:font-weight-asian="normal" style:font-weight-complex="normal"/>
    </style:style>
    <style:style style:name="T12" style:family="text">
      <style:text-properties officeooo:rsid="0021908e"/>
    </style:style>
    <style:style style:name="T13" style:family="text">
      <style:text-properties style:font-name="Comic Relief" fo:font-size="16pt" style:text-underline-style="none" fo:font-weight="bold" officeooo:rsid="0012bc0b" style:font-size-asian="16pt" style:font-weight-asian="bold" style:font-size-complex="16pt" style:font-weight-complex="bold"/>
    </style:style>
    <style:style style:name="T14"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5" style:family="text">
      <style:text-properties style:font-name="Comic Relief" fo:font-size="16pt" style:font-size-asian="16pt" style:font-size-complex="16pt"/>
    </style:style>
    <style:style style:name="T16" style:family="text">
      <style:text-properties officeooo:rsid="00169dde"/>
    </style:style>
    <style:style style:name="T17" style:family="text">
      <style:text-properties officeooo:rsid="0016378d"/>
    </style:style>
    <style:style style:name="T18" style:family="text">
      <style:text-properties fo:font-weight="bold" officeooo:rsid="0016378d" style:font-weight-asian="bold" style:font-weight-complex="bold"/>
    </style:style>
    <style:style style:name="T19" style:family="text">
      <style:text-properties style:text-position="super 58%"/>
    </style:style>
    <style:style style:name="T20" style:family="text">
      <style:text-properties fo:background-color="#ffff00" loext:char-shading-value="0"/>
    </style:style>
    <style:style style:name="T21" style:family="text">
      <style:text-properties officeooo:rsid="001ae328"/>
    </style:style>
    <style:style style:name="T22" style:family="text">
      <style:text-properties officeooo:rsid="0020e28b"/>
    </style:style>
    <style:style style:name="T23" style:family="text">
      <style:text-properties fo:font-weight="normal" officeooo:rsid="0020e28b"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font-name="Comic Relief" fo:font-size="16pt" style:text-underline-style="none" fo:font-weight="normal" officeooo:rsid="002864f8" style:font-size-asian="16pt" style:font-weight-asian="normal" style:font-size-complex="16pt" style:font-weight-complex="normal"/>
    </style:style>
    <style:style style:name="T26" style:family="text">
      <style:text-properties style:font-name="Comic Relief" fo:font-size="16pt" style:text-underline-style="none" fo:font-weight="bold" officeooo:rsid="002864f8" style:font-size-asian="16pt" style:font-weight-asian="bold" style:font-size-complex="16pt" style:font-weight-complex="bold"/>
    </style:style>
    <style:style style:name="T27" style:family="text">
      <style:text-properties officeooo:rsid="002a42db"/>
    </style:style>
    <style:style style:name="T28" style:family="text">
      <style:text-properties officeooo:rsid="002dbc7d"/>
    </style:style>
    <style:style style:name="T29" style:family="text">
      <style:text-properties officeooo:rsid="0035b783"/>
    </style:style>
    <style:style style:name="T30" style:family="text">
      <style:text-properties officeooo:rsid="00324829"/>
    </style:style>
    <style:style style:name="T31" style:family="text">
      <style:text-properties officeooo:rsid="0032ab49"/>
    </style:style>
    <style:style style:name="T32" style:family="text">
      <style:text-properties officeooo:rsid="00343473"/>
    </style:style>
    <style:style style:name="T33" style:family="text">
      <style:text-properties officeooo:rsid="003de58c"/>
    </style:style>
    <style:style style:name="T34" style:family="text">
      <style:text-properties officeooo:rsid="003dbf7f"/>
    </style:style>
    <style:style style:name="T35" style:family="text">
      <style:text-properties officeooo:rsid="0037321e"/>
    </style:style>
    <style:style style:name="T36" style:family="text">
      <style:text-properties style:font-name="Comic Relief" fo:font-size="16pt" style:text-underline-style="none" fo:font-weight="normal" officeooo:rsid="0038b0c4" style:font-size-asian="16pt" style:font-weight-asian="normal" style:font-size-complex="16pt" style:font-weight-complex="normal"/>
    </style:style>
    <style:style style:name="T37" style:family="text">
      <style:text-properties style:font-name="Comic Relief" fo:font-size="16pt" style:text-underline-style="none" fo:font-weight="normal" officeooo:rsid="003f56af" style:font-size-asian="16pt" style:font-weight-asian="normal" style:font-size-complex="16pt" style:font-weight-complex="normal"/>
    </style:style>
    <style:style style:name="T38" style:family="text">
      <style:text-properties fo:font-weight="normal" officeooo:rsid="003ff66f" style:font-weight-asian="normal" style:font-weight-complex="normal"/>
    </style:style>
    <style:style style:name="T39" style:family="text">
      <style:text-properties officeooo:rsid="0043625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text:span text:style-name="T2">i</text:span>tion of both are as follows:</text:p>
      <text:p text:style-name="P7"/>
      <text:p text:style-name="P7"><text:span text:style-name="T2">C</text:span>ontin<text:span text:style-name="T2">u</text:spa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text:span text:style-name="T2">re as follows</text:span>:</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3">No. Of Frequency * 100</text:span><text:span text:style-name="T4"><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5">To explain this we will be using a data of monthly expenses.</text:span></text:p>
      <text:p text:style-name="P19">Here u can see we cant calculate the frequency of the data here but we can only plot a simple bar graph which cant show the flow. In short we will use bar graph when we have frequency of data and we will be using line graph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20"><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1"><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Here we can see it showing the flow of trend like the expenses flow from month 1 to month 12 this is the core reason to create a line graph.</text:p>
      <text:p text:style-name="P21"/>
      <text:p text:style-name="P21"/>
      <text:p text:style-name="P21"/>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O-Gives:</text:p>
      <text:p text:style-name="P24">To create an o-gives we have to take out cumulative frequencies.</text:p>
      <text:p text:style-name="P24">So now what is cumulative frequencies lets calculate what is it:</text:p>
      <text:p text:style-name="P24"/>
      <text:p text:style-name="P24"><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6">n</text:span> it stays the same as 10k and for Feb it will now be 22k (10k of Jan + 12k of Feb) and for march it will now be 42k <text:tab/> <text:s/><text:tab/> (10k of Jan + 12k of Feb + 20k of Mar).</text:p>
      <text:p text:style-name="P24"><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5">Which is drawn here→</text:p>
      <text:p text:style-name="P25"/>
      <text:p text:style-name="P21"/>
      <text:p text:style-name="P21"/>
      <text:p text:style-name="P26"/>
      <text:p text:style-name="P26"/>
      <text:p text:style-name="P27"><text:s text:c="19"/><text:span text:style-name="T7"/></text:p>
      <text:p text:style-name="P28"><text:soft-page-break/><text:span text:style-name="T8">Two Way Table:</text:span></text:p>
      <text:p text:style-name="P29"><text:s/></text:p>
      <text:p text:style-name="P29"><text:span text:style-name="T9">Currently the table we have on the right is a one way table. Lets assume this table is of data of the period of revenue of 4 years like from 2020-2023 now we can break it down as follows because we don’t have sepa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9">ombined data</text:span> <text:span text:style-name="T9">so we will break it down as follows:</text:span></text:p>
      <text:p text:style-name="P29"><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9"/>
      <text:p text:style-name="P29"/>
      <text:p text:style-name="P29"/>
      <text:p text:style-name="P29"/>
      <text:p text:style-name="P29"/>
      <text:p text:style-name="P29"/>
      <text:p text:style-name="P29"/>
      <text:p text:style-name="P29"/>
      <text:p text:style-name="P29"/>
      <text:p text:style-name="P30">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9"/>
      <text:p text:style-name="P29"><text:span text:style-name="T9">Now using this data we can create a line graph for each year. </text:span><text:span text:style-name="T10">Or even a bar graph for each year</text:span></text:p>
      <text:p text:style-name="P29"><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9"><text:s text:c="21"/></text:p>
      <text:p text:style-name="P29"/>
      <text:p text:style-name="P29"/>
      <text:p text:style-name="P31"/>
      <text:p text:style-name="P32"><text:soft-page-break/>In 2 way table there is a thing known as <text:span text:style-name="T1">Dot Plot </text:span>its basically a bar graph with dots stacked on each other. To create that we basically need frequency of specific data which fulfill the need.</text:p>
      <text:p text:style-name="P32">Which needs data like this <text:s/>→</text:p>
      <text:p text:style-name="P32">It helps to build understanding for histogram.</text:p>
      <text:p text:style-name="P32"><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2"/>
      <text:p text:style-name="P32"/>
      <text:p text:style-name="P32"/>
      <text:p text:style-name="P32"/>
      <text:p text:style-name="P32"/>
      <text:p text:style-name="P32"/>
      <text:p text:style-name="P32"/>
      <text:p text:style-name="P32"/>
      <text:p text:style-name="P33"><text:tab/><text:tab/><text:tab/>Dot Plot of the dat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Relative Frequency Table:</text:p>
      <text:p text:style-name="P32">A relative frequency table can be made through both one way and two way table but most of the data we see around is two way so we will focus on that</text:p>
      <text:p text:style-name="P32"/>
      <text:p text:style-name="P32"><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2"/>
      <text:p text:style-name="P32"/>
      <text:p text:style-name="P32"/>
      <text:p text:style-name="P32"/>
      <text:p text:style-name="P32"/>
      <text:p text:style-name="P32"/>
      <text:p text:style-name="P32"/>
      <text:p text:style-name="P33"/>
      <text:p text:style-name="P35">(its a two way table because there is dependencies on two things the color and the flower like if someone asks us where is 20 so u will be telling them in red column and rose rows something like that I hope u got my point)</text:p>
      <text:p text:style-name="P35"/>
      <text:p text:style-name="P36">Now lets calculate the column frequency of the data for which we will be calculating the frequency from 100. (<text:span text:style-name="T1">For detailed calculations refer to the notebook we have done calculations there</text:span>)</text:p>
      <text:p text:style-name="P37"><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7">Formula for calculating→ <text:span text:style-name="T3">No. of An Element*100</text:span></text:p>
      <text:p text:style-name="P38"><text:s text:c="30"/><text:span text:style-name="T11">Total Number <text:s text:c="41"/></text:span></text:p>
      <text:p text:style-name="P37">We have calculated the column frequency so if we total the column frequency we will be getting 100% but not for rows. Fortunately we can also calculate row related frequencies.</text:p>
      <text:p text:style-name="P37"/>
      <text:p text:style-name="P39">We do this because in Machine Learning We Mostly need to convert numeric data into 0s and 1</text:p>
      <text:p text:style-name="P40"><text:soft-page-break/>Joint Distribution:</text:p>
      <text:p text:style-name="P37">A joint distribution table is similar to relative frequency table as it also contains percentage. This table compares two different distributions in a single table.</text:p>
      <text:p text:style-name="P37"><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7"/>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1"><text:soft-page-break/>Histogram:</text:p>
      <text:p text:style-name="P42">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2">We will be seeing using this data→</text:p>
      <text:p text:style-name="P42"/>
      <text:p text:style-name="P42">This data is incomplete it has multiple rows but for adding this here we are using only this data.</text:p>
      <text:p text:style-name="P42"/>
      <text:p text:style-name="P42"/>
      <text:p text:style-name="P42"/>
      <text:p text:style-name="P42"/>
      <text:p text:style-name="P42"/>
      <text:p text:style-name="P42"/>
      <text:p text:style-name="P42"/>
      <text:p text:style-name="P42">Now for making histogram we will be using x-axis and we will be creating bins just like this:</text:p>
      <text:p text:style-name="P42"><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2"><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2">Now <text:span text:style-name="T2">in </text:span>these bins we <text:span text:style-name="T2">will </text:span>put the candidate into their desired bins using their age. Just like the image I have attached→</text:p>
      <text:p text:style-name="P42"><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2">The more the number of data in the bins the more tall the histogram becomes</text:p>
      <text:p text:style-name="P42"/>
      <text:p text:style-name="P42"/>
      <text:p text:style-name="P42"/>
      <text:p text:style-name="P42"/>
      <text:p text:style-name="P43">Now lets work on actual data</text:p>
      <text:p text:style-name="P43"><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3">here max is 24 and min is 3 so range is 21</text:p>
      <text:p text:style-name="P43"><text:soft-page-break/>For creating bins we usually have to play around like here we can do is divide the range with 6 21/6 = 3.5.</text:p>
      <text:p text:style-name="P43">For safe side we will round it of to 4 and the bins we will have is.</text:p>
      <text:p text:style-name="P43">1-5,6-10,11-15,1<text:span text:style-name="T12">6</text:span>-20,21-25</text:p>
      <text:p text:style-name="P43"><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4">Question: Why and When we use Histogram?</text:p>
      <text:p text:style-name="P45"><text:span text:style-name="T13">Answer: </text:span><text:span text:style-name="T14">We use Histogram when we have quantitative data</text:span>,<text:span text:style-name="T15">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7">DATA ANALYZING</text:p>
      <text:p text:style-name="P44"/>
      <text:p text:style-name="P48">In this section we will be focusing how we can do things mathematically to better understand our data</text:p>
      <text:p text:style-name="P49"/>
      <text:p text:style-name="P50">Measure Of Central Tendency:</text:p>
      <text:p text:style-name="P51">It means it is the way we can describe the middle part of our data. The importance of middle part of the data we will see it further in the course why is it this much important.</text:p>
      <text:p text:style-name="P51"/>
      <text:p text:style-name="P52">Mean →<text:span text:style-name="T5"> The first way to find the middle part of the data is mean. It is also known as average.</text:span></text:p>
      <text:p text:style-name="P52"/>
      <text:p text:style-name="P51"><text:span text:style-name="T1">Example →</text:span> Here we have data 1,2,3,4,5. Here 3 is the middle part because its continuous data like equal spacing between elements.</text:p>
      <text:p text:style-name="P51"/>
      <text:p text:style-name="P51">But when it comes to non continuous data lets see it. Here we have data 2,2,7,9,10.</text:p>
      <text:p text:style-name="P51"/>
      <text:p text:style-name="P52">Formula → <text:span text:style-name="T5">Sum of all numbers / total numbers</text:span></text:p>
      <text:p text:style-name="P51"/>
      <text:p text:style-name="P51">Mean = 6 for the non continuous data refer to the notebook for detailed calculation</text:p>
      <text:p text:style-name="P53"><draw:frame draw:style-name="fr3"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3">Details of this are mentioned in notebook</text:p>
      <text:p text:style-name="P54"/>
      <text:p text:style-name="P54">Median → <text:span text:style-name="T5">The second way to find the middle part of the data. It doesn’t necessarily need to be calculated through mathematical formulae it is simple.</text:span></text:p>
      <text:p text:style-name="P53"/>
      <text:p text:style-name="P54">Example → <text:span text:style-name="T5">4,7,9,10 The middle part of this data is 7 and 9 so we will add them both and divide them by 2 we will get 8 and 8 will be the middle point of this data.</text:span></text:p>
      <text:p text:style-name="P53">Another example 1,2,6,7,9 no need for calculation here we can exactly see that 6 is the midpoint like on the left of 6 we have <text:soft-page-break/>2 elements and on the right too we have 2 elements so 6 automatically becomes the midpoint.</text:p>
      <text:p text:style-name="P51"><text:s/></text:p>
      <text:p text:style-name="P55">Mode→ <text:span text:style-name="T5">It is the most simplest one. Mode is the most repeated element in the data.</text:span></text:p>
      <text:p text:style-name="P56"/>
      <text:p text:style-name="P55">Example→ <text:span text:style-name="T5">2,2,5,6,7,8,10,10,10 Here we can clearly see 10 is the most repeated value in the data hence 10 is the mode of this data.</text:span></text:p>
      <text:p text:style-name="P56"/>
      <text:p text:style-name="P56">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7">M<text:span text:style-name="T16">easure</text:span> O<text:span text:style-name="T16">f</text:span> S<text:span text:style-name="T16">pread</text:span>:</text:p>
      <text:p text:style-name="P56">It means how much and how are data spread around its center. Its different from what we have seen above.</text:p>
      <text:p text:style-name="P56">It means in simple words how much your data is spread from the central point.</text:p>
      <text:p text:style-name="P56">We will be talking about<text:span text:style-name="T1"> Range, IQR (Interquartile range) and Standard Deviation </text:span>as they are also measure of spread. But here we will be covering <text:span text:style-name="T1">Range and IQR</text:span> for now <text:span text:style-name="T17">and </text:span><text:span text:style-name="T18">variance and std deviation</text:span><text:span text:style-name="T17"> are part too but we will discuss them later.</text:span></text:p>
      <text:p text:style-name="P56"/>
      <text:p text:style-name="P58">Range:</text:p>
      <text:p text:style-name="P59">To find the range we subtract the maximum value in the data with the minimum value in the data doing this we get Range.</text:p>
      <text:p text:style-name="P60"><text:span text:style-name="T17">F</text:span>ormula → <text:span text:style-name="T1">Range = Rmax-Rmin.</text:span></text:p>
      <text:p text:style-name="P59">Range tells us the distribution of data how and in what range they are distributed.</text:p>
      <text:p text:style-name="P59"><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1">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6"/>
      <text:p text:style-name="P62">Interquartile Range(IQR):</text:p>
      <text:p text:style-name="P61">Before moving towards Interquartile we first need to understand what are Quartiles. Because in IQR we will be measuring the distance between one quarter and another quarter of our data.</text:p>
      <text:p text:style-name="P63">There are mostly 3 types of percentile and sometimes 4 types of percentile.</text:p>
      <text:p text:style-name="P64">Q1-25% <text:span text:style-name="T5">Percentile</text:span></text:p>
      <text:p text:style-name="P64">Q2-50% <text:span text:style-name="T5">Percentile</text:span></text:p>
      <text:p text:style-name="P64">Q3-75% <text:span text:style-name="T5">Percentile</text:span></text:p>
      <text:p text:style-name="P64">Q4-100% <text:span text:style-name="T5">Percentile</text:span></text:p>
      <text:p text:style-name="P63"/>
      <text:p text:style-name="P64">Percentile means<text:span text:style-name="T5"> the percentage of data that lies below a specific value.</text:span></text:p>
      <text:p text:style-name="P63">To understand this better let see a data we have a data</text:p>
      <text:p text:style-name="P63"><text:soft-page-break/>12,12,13,14,15,17,20,20,28,29,31,35,46,46,48,51,59,60</text:p>
      <text:p text:style-name="P63"/>
      <text:p text:style-name="P63"><draw:frame draw:style-name="fr3" draw:name="Image27" text:anchor-type="char" svg:width="6.4083in" svg:height="1.2in" draw:z-index="26"><draw:image xlink:href="Pictures/1000000100000301000000902ADBB0B1.png" xlink:type="simple" xlink:show="embed" xlink:actuate="onLoad" draw:mime-type="image/png"/></draw:frame><text:s/></text:p>
      <text:p text:style-name="P63">We can calculate Q1,Q2,Q3 by dividing the data into two parts like in the data we have 18 elements we can divide them into 9 9 parts for which then we can calculate the data. For the calculating Q1 we can see the 5<text:span text:style-name="T19">th</text:span> value of the data that will be Q1 for the Q2 we can do is divide the 9<text:span text:style-name="T19">th</text:span> and 10<text:span text:style-name="T19">th</text:span> element and we can get Q2 which exactly means the mean of the data. And for Q3 we will do the same thing but with the second part of the data choosing the 5<text:span text:style-name="T19">th</text:span> value of the data it will be Q3.</text:p>
      <text:p text:style-name="P63"/>
      <text:p text:style-name="P63"><draw:frame draw:style-name="fr3" draw:name="Image28" text:anchor-type="char" svg:width="6.4752in" svg:height="3.0417in" draw:z-index="27"><draw:image xlink:href="Pictures/10000001000003090000016DCF9C16F4.png" xlink:type="simple" xlink:show="embed" xlink:actuate="onLoad" draw:mime-type="image/png"/></draw:frame></text:p>
      <text:p text:style-name="P65">Now to find IQR we just have to subtract Q1 From Q3 46-15 = 31.</text:p>
      <text:p text:style-name="P65">So if the IQR is low it means the data is close to the median if the IQR is high it means the data is highly spread from the center.</text:p>
      <text:p text:style-name="P56"/>
      <text:p text:style-name="P56"/>
      <text:p text:style-name="P56"/>
      <text:p text:style-name="P56"/>
      <text:p text:style-name="P56"/>
      <text:p text:style-name="P56"/>
      <text:p text:style-name="P56"><text:soft-page-break/></text:p>
      <text:p text:style-name="P56"/>
      <text:p text:style-name="P66">Outliers:</text:p>
      <text:p text:style-name="P67">To understand outliers we need to look at an example of data first only in that way we can understand what really outliers are</text:p>
      <text:p text:style-name="P67">1,2,4,7,9,10,101.</text:p>
      <text:p text:style-name="P67">Lets find the central tendency of this data we will be using mean and median since we cant use mode because there are no repeated values.</text:p>
      <text:p text:style-name="P67">Mean → 1+2+4+7+9+10+101 = 134/7 → 19.4</text:p>
      <text:p text:style-name="P67">Median → <text:span text:style-name="T20">1,2,4</text:span>,7,<text:span text:style-name="T20">9,10,101</text:span> = 7</text:p>
      <text:p text:style-name="P67"/>
      <text:p text:style-name="P67">Here u can see how much big difference there is between the mean and median its due to an outlier (101) and if we remove that mean and median would be very close then.</text:p>
      <text:p text:style-name="P67"/>
      <text:p text:style-name="P67">Outliers damage our data by:</text:p>
      <text:list text:style-name="L1">
        <text:list-item>
          <text:p text:style-name="P68">They distort measures like mean and standard deviation making them less representative to the given data.</text:p>
        </text:list-item>
        <text:list-item>
          <text:p text:style-name="P68">In machine learning especially in regression models outliers can disproportionately influence the model leading to poor generalization.</text:p>
        </text:list-item>
        <text:list-item>
          <text:p text:style-name="P69">Outliers impact our model performance our statistical testing and many other thing so we have to get rid from them.</text:p>
        </text:list-item>
      </text:list>
      <text:p text:style-name="P70">So now to get rid of outliers we use the upper and lower fence approach in our data by that we can get rid of them.</text:p>
      <text:p text:style-name="P71"><draw:frame draw:style-name="fr3" draw:name="Image29" text:anchor-type="char" svg:width="5.9083in" svg:height="1.15in" draw:z-index="28"><draw:image xlink:href="Pictures/10000001000002C50000008AAE93222E.png" xlink:type="simple" xlink:show="embed" xlink:actuate="onLoad" draw:mime-type="image/png"/></draw:frame><text:span text:style-name="T21">The points that show linking between them is the point till we consider our data after the end line no data will be considered.</text:span></text:p>
      <text:p text:style-name="P71"/>
      <text:p text:style-name="P71"/>
      <text:p text:style-name="P71"/>
      <text:p text:style-name="P71"><draw:frame draw:style-name="fr3" draw:name="Image30" text:anchor-type="char" svg:width="5.9252in" svg:height="2.1583in" draw:z-index="29"><draw:image xlink:href="Pictures/10000001000002C700000103910FC4F7.png" xlink:type="simple" xlink:show="embed" xlink:actuate="onLoad" draw:mime-type="image/png"/></draw:frame><text:soft-page-break/><text:s/></text:p>
      <text:p text:style-name="P70">(Mathematical calculation done is notebook)</text:p>
      <text:p text:style-name="P70"/>
      <text:p text:style-name="P72">To find upper and lower fence we have Formula to calculate each fence.</text:p>
      <text:p text:style-name="P72"/>
      <text:p text:style-name="P72">Upper Fence → Q<text:span text:style-name="T12">3+</text:span>1.5(IQR)</text:p>
      <text:p text:style-name="P72"/>
      <text:p text:style-name="P72">Lower Fence → Q<text:span text:style-name="T12">1</text:span>-1.5(IQR)</text:p>
      <text:p text:style-name="P72"/>
      <text:p text:style-name="P72">For this example we got this after calculations</text:p>
      <text:p text:style-name="P72"/>
      <text:p text:style-name="P72">IQR = 7</text:p>
      <text:p text:style-name="P72">Q1 = 4</text:p>
      <text:p text:style-name="P72">Q3 = 11</text:p>
      <text:p text:style-name="P72"/>
      <text:p text:style-name="P72">Upper Fence → 21.5</text:p>
      <text:p text:style-name="P72"/>
      <text:p text:style-name="P72">Lower Fence → -6.5</text:p>
      <text:p text:style-name="P72"/>
      <text:p text:style-name="P72">We have to check whether there is any value below lower fence or any value above the upper fence if those exists they are outliers.</text:p>
      <text:p text:style-name="P72"/>
      <text:p text:style-name="P72"/>
      <text:p text:style-name="P72"/>
      <text:p text:style-name="P72"/>
      <text:p text:style-name="P72"/>
      <text:p text:style-name="P72"/>
      <text:p text:style-name="P72"/>
      <text:p text:style-name="P72"/>
      <text:p text:style-name="P72"/>
      <text:p text:style-name="P73"><text:soft-page-break/>5 Number Summary:</text:p>
      <text:p text:style-name="P74">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5">Minimum</text:p>
        </text:list-item>
        <text:list-item>
          <text:p text:style-name="P75">First Quartiles (Q1)</text:p>
        </text:list-item>
        <text:list-item>
          <text:p text:style-name="P75">Median (Q2)</text:p>
        </text:list-item>
        <text:list-item>
          <text:p text:style-name="P75">Third Quartiles (Q3)</text:p>
        </text:list-item>
        <text:list-item>
          <text:p text:style-name="P75">Maximum</text:p>
        </text:list-item>
      </text:list>
      <text:p text:style-name="P76">Lets work with data</text:p>
      <text:p text:style-name="P77">2,4,7,10,15,20,25,205 calculations done in notebook</text:p>
      <text:p text:style-name="P78">Data after doing calculations</text:p>
      <text:p text:style-name="P79">Q1 = 5.5,Q2 = 12.5,Q3 = 22.5,IQR = 17,UF = 48,LF = -20</text:p>
      <text:p text:style-name="P77"/>
      <text:p text:style-name="P80">Preparing 5 Number Summary <text:span text:style-name="T22">After Removing Outliers</text:span></text:p>
      <text:p text:style-name="P80">Min →<text:span text:style-name="T5"> 2</text:span></text:p>
      <text:p text:style-name="P80">Q1<text:span text:style-name="T5"> </text:span>→ <text:span text:style-name="T23">4</text:span></text:p>
      <text:p text:style-name="P80">Q2 → <text:span text:style-name="T5">1</text:span><text:span text:style-name="T23">0</text:span></text:p>
      <text:p text:style-name="P80">Q3 → <text:span text:style-name="T5">2</text:span><text:span text:style-name="T23">0</text:span></text:p>
      <text:p text:style-name="P80">Max → <text:span text:style-name="T5">25</text:span></text:p>
      <text:p text:style-name="P81"/>
      <text:p text:style-name="P82"><draw:frame draw:style-name="fr2" draw:name="Image31" text:anchor-type="char" svg:x="0.7634in" svg:y="0.65in" svg:width="4.4in" svg:height="3.6555in" draw:z-index="30"><draw:image xlink:href="Pictures/10000001000002BF00000248F9604F61.png" xlink:type="simple" xlink:show="embed" xlink:actuate="onLoad" draw:mime-type="image/png"/></draw:frame>This summary is used for plotting box plots u will understand better when u will see data visualization.</text:p>
      <text:p text:style-name="P83"/>
      <text:p text:style-name="P83"/>
      <text:p text:style-name="P83"/>
      <text:p text:style-name="P83"/>
      <text:p text:style-name="P83"/>
      <text:p text:style-name="P84"><draw:frame draw:style-name="fr1" draw:name="Image32" text:anchor-type="char" svg:width="5.5583in" svg:height="4.4252in" draw:z-index="31"><draw:image xlink:href="Pictures/100000010000029B00000213C54AEC8B.png" xlink:type="simple" xlink:show="embed" xlink:actuate="onLoad" draw:mime-type="image/png"/></draw:frame><text:soft-page-break/>(We have also implemented Code for outliers too see In the repository)</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6"><text:soft-page-break/>DATA DISTRIBUTION</text:p>
      <text:p text:style-name="P87">In this section we will create a base about hypothesis testing.</text:p>
      <text:p text:style-name="P87">We will learn about kernel density estimation curve what we draw in histogram. We will also see how the data is spread around the mean.</text:p>
      <text:p text:style-name="P87"/>
      <text:p text:style-name="P88">Lets see with the example of a distribution.<draw:frame draw:style-name="fr2" draw:name="Image33" text:anchor-type="char" svg:x="0.3799in" svg:y="1.0602in" svg:width="5.6in" svg:height="1.85in" draw:z-index="32"><draw:image xlink:href="Pictures/10000001000002A0000000DE78D62667.png" xlink:type="simple" xlink:show="embed" xlink:actuate="onLoad" draw:mime-type="image/png"/></draw:frame> In the below distribution we can see how the curve is disturbed because of two outliers that’s the sole reason why our bell curve/ kernel density estimation curve is a bit odd.</text:p>
      <text:p text:style-name="P88"/>
      <text:p text:style-name="P88">In this section we will see how data distribution starts with a histogram then it becomes frequency polygon and eventually turns into a density curve.</text:p>
      <text:p text:style-name="P87">Histogram → Frequency Polygon → Curve</text:p>
      <text:p text:style-name="P88"/>
      <text:p text:style-name="P89">Normal Distribution:</text:p>
      <text:p text:style-name="P90">Distribution which always forms a bell shaped curve. Its used in many areas.</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9"><text:soft-page-break/><text:span text:style-name="T3">MEAN, VARIANCE AND STANDARD DEVIATION:</text:span><text:span text:style-name="T24"/></text:p>
      <text:p text:style-name="P90">Before we begin lets understand what basically is sample and population in stats</text:p>
      <text:p text:style-name="P90"><draw:frame draw:style-name="fr2" draw:name="Image34" text:anchor-type="char" svg:x="0.0201in" svg:y="0in" svg:width="5.0173in" svg:height="2.7752in" draw:z-index="33"><draw:image xlink:href="Pictures/1000000100000359000001DA60C0BAF2.png" xlink:type="simple" xlink:show="embed" xlink:actuate="onLoad" draw:mime-type="image/png"/></draw:frame><text:line-break/></text:p>
      <text:p text:style-name="P90"/>
      <text:p text:style-name="P90"/>
      <text:p text:style-name="P90"/>
      <text:p text:style-name="P90"/>
      <text:p text:style-name="P90"/>
      <text:p text:style-name="P90"/>
      <text:p text:style-name="P90"/>
      <text:p text:style-name="P90"/>
      <text:p text:style-name="P90"/>
      <text:p text:style-name="P90"/>
      <text:p text:style-name="P92"><text:span text:style-name="T25">To understand properly what a sample is lets take an example of a medicine like we have created a medicine for cancer we have to test it so we can’t test on all people so what we will do is gather people from around the globe lets take an example like we take out 500 people from different regions and what will be the result of that test will be considered for the whole population. This is done in</text:span><text:span text:style-name="T26"> Inferential Statistics.</text:span><text:span text:style-name="T25"> We will do it later.</text:span></text:p>
      <text:p text:style-name="P90"><text:span text:style-name="T1">Note:</text:span> When discussing Mean, Variance and Standard Deviation. It is important to clarify that whether we are referring to a population or standard deviation. As formula for each differ.</text:p>
      <text:p text:style-name="P90"/>
      <text:p text:style-name="P89">Variance:</text:p>
      <text:p text:style-name="P90">Variance is a statistical measure that quantifies the spread or dispersion of set of data points around their mean.</text:p>
      <text:p text:style-name="P93">In short variance tells the value of the data which is clustered around the mean or how the data is spread around the mean.</text:p>
      <text:p text:style-name="P93">To find the variance we first see a data a simple one:</text:p>
      <text:p text:style-name="P93">85,90,95,100,105</text:p>
      <text:p text:style-name="P93">→ Find Mean first = (85+90+95+100+105)/5 = 95</text:p>
      <text:p text:style-name="P93">→ Then Find the <text:span text:style-name="T27">computed difference </text:span>to find <text:span text:style-name="T27">it</text:span> we will be doing this subtracting the data numbers with mean and wrapping each block with square adding them<draw:frame draw:style-name="fr2" draw:name="Image35" text:anchor-type="char" svg:x="1.3043in" svg:y="0.7335in" svg:width="5.0689in" svg:height="0.4091in" draw:z-index="34"><draw:image xlink:href="Pictures/10000001000003B90000004D10452E42.png" xlink:type="simple" xlink:show="embed" xlink:actuate="onLoad" draw:mime-type="image/png"/></draw:frame></text:p>
      <text:p text:style-name="P93"/>
      <text:p text:style-name="P93"/>
      <text:p text:style-name="P93"><text:soft-page-break/>→ <text:span text:style-name="T27">Now just divide the computed difference with no of elements and here we can see the value of variance → 250/5 = 50</text:span></text:p>
      <text:p text:style-name="P94">50 here is the variance value</text:p>
      <text:p text:style-name="P94"><draw:frame draw:style-name="fr2" draw:name="Image36" text:anchor-type="char" svg:x="-0.0055in" svg:y="0.0075in" svg:width="2.0835in" svg:height="0.8752in" draw:z-index="35"><draw:image xlink:href="Pictures/10000001000000FA0000006996806909.png" xlink:type="simple" xlink:show="embed" xlink:actuate="onLoad" draw:mime-type="image/png"/></draw:frame>← Formula of variance in statistical terms. Lets break it down what each means for instance (This formula is for population).</text:p>
      <text:p text:style-name="P95">N means no of elements, i=1 means no of elements we will be moving as the elements number increase</text:p>
      <text:p text:style-name="P95">g small n. Mean of population is represented by meow and for sample it is represented by x bar. And to represent mean of population we will be using sigma symbol with a square and for sample we represent using small s with square. Standard deviation is represented sigma and small s sigma for population and small s for sample</text:p>
      <text:p text:style-name="P96"><draw:frame draw:style-name="fr2" draw:name="Image37" text:anchor-type="char" svg:x="-0.1445in" svg:y="0.0339in" svg:width="6.6929in" svg:height="1.9366in" draw:z-index="36"><draw:image xlink:href="Pictures/100000010000036A000000FD20B6A434.png" xlink:type="simple" xlink:show="embed" xlink:actuate="onLoad" draw:mime-type="image/png"/></draw:frame></text:p>
      <text:p text:style-name="P96"><text:span text:style-name="T28">(</text:span>Proper breakdown of each thing is present in the notebook typing here is a challenge for me.<text:span text:style-name="T28">)</text:span></text:p>
      <text:p text:style-name="P96"/>
      <text:p text:style-name="P97">If we want to calculate varia<draw:frame draw:style-name="fr2" draw:name="Image38" text:anchor-type="char" svg:x="3.4382in" svg:y="0.0575in" svg:width="3.4752in" svg:height="1.1083in" draw:z-index="37"><draw:image xlink:href="Pictures/10000001000001A100000085A2605EE3.png" xlink:type="simple" xlink:show="embed" xlink:actuate="onLoad" draw:mime-type="image/png"/></draw:frame>nce of sample the formula just becomes this →</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Standard Deviation:</text:p>
      <text:p text:style-name="P98">Standard Deviation is just the square root of the variance its as simple as that. The symbols will be changed depending on for what u r taking standard deviation of is it population or sample.</text:p>
      <text:p text:style-name="P98"><draw:frame draw:style-name="fr2" draw:name="Image39" text:anchor-type="char" svg:x="-0.1366in" svg:y="0.0681in" svg:width="6.6929in" svg:height="1.7583in" draw:z-index="38"><draw:image xlink:href="Pictures/100000010000034D000000DEE1EB3B5E.png" xlink:type="simple" xlink:show="embed" xlink:actuate="onLoad" draw:mime-type="image/png"/></draw:frame>Basically standard deviation follows the same process u first take out mean then distance(computational difference) then divide it with total number of elements.</text:p>
      <text:p text:style-name="P99">NOTE:</text:p>
      <text:p text:style-name="P100">By default use sample formulae unless population or entire or anything related to this is mentioned.</text:p>
      <text:p text:style-name="P101"/>
      <text:p text:style-name="P97">Q: What does it do?</text:p>
      <text:p text:style-name="P97">A: <text:span text:style-name="T5">Standard deviation tells that how much distance should be between the mean and the points.</text:span></text:p>
      <text:p text:style-name="P98"><draw:frame draw:style-name="fr2" draw:name="Image40" text:anchor-type="char" svg:x="0.961in" svg:y="0in" svg:width="3.7417in" svg:height="0.9917in" draw:z-index="39"><draw:image xlink:href="Pictures/10000001000001C100000077A4FCCFA3.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02">Density Curve:</text:p>
      <text:p text:style-name="P103">To understand this concept first we need to understand what is histogram as we already have discussed histogram I will not be discussing here again.</text:p>
      <text:p text:style-name="P103"><draw:frame draw:style-name="fr2" draw:name="Image41" text:anchor-type="char" svg:x="4.2335in" svg:y="0.2382in" svg:width="2.452in" svg:height="0.8945in" draw:z-index="40"><draw:image xlink:href="Pictures/100000010000019E00000097248386ED.png" xlink:type="simple" xlink:show="embed" xlink:actuate="onLoad" draw:mime-type="image/png"/></draw:frame></text:p>
      <text:p text:style-name="P102">Steps To Create a Density Curve:</text:p>
      <text:list text:style-name="L3">
        <text:list-item>
          <text:p text:style-name="P104">First create a histogram just like this →</text:p>
        </text:list-item>
      </text:list>
      <text:p text:style-name="P103"/>
      <text:list text:continue-numbering="true" text:style-name="L3">
        <text:list-item>
          <text:p text:style-name="P104">Now we just have to plot points above the histogram and connect them just like we were doing for line graph<draw:frame draw:style-name="fr2" draw:name="Image42" text:anchor-type="char" svg:x="4.3602in" svg:y="0in" svg:width="2.2673in" svg:height="0.9807in" draw:z-index="41"><draw:image xlink:href="Pictures/1000000100000189000000AAD5641471.png" xlink:type="simple" xlink:show="embed" xlink:actuate="onLoad" draw:mime-type="image/png"/></draw:frame> just like this →</text:p>
        </text:list-item>
      </text:list>
      <text:p text:style-name="P103"/>
      <text:list text:continue-numbering="true" text:style-name="L3">
        <text:list-item>
          <text:p text:style-name="P104">After this we have to remove the histogram bars. The fewer bin we use the more inaccurate the frequency polygon we will get. Now we have a frequency polygon<draw:frame draw:style-name="fr2" draw:name="Image43" text:anchor-type="char" svg:x="4.0898in" svg:y="0in" svg:width="2.9689in" svg:height="1.2839in" draw:z-index="42"><draw:image xlink:href="Pictures/1000000100000189000000AAA23360C0.png" xlink:type="simple" xlink:show="embed" xlink:actuate="onLoad" draw:mime-type="image/png"/></draw:frame> just like this → </text:p>
          <text:p text:style-name="P104"><draw:frame draw:style-name="fr2" draw:name="Image44" text:anchor-type="char" svg:x="4.4827in" svg:y="0.2118in" svg:width="2.4484in" svg:height="1.0591in" draw:z-index="43"><draw:image xlink:href="Pictures/1000000100000189000000AACDC91574.png" xlink:type="simple" xlink:show="embed" xlink:actuate="onLoad" draw:mime-type="image/png"/></draw:frame></text:p>
        </text:list-item>
        <text:list-item>
          <text:p text:style-name="P105">Now imagine u are using more bins the dots will become more closer and eventually it will become smooth,continuous probability curve which is also known as a density curve.</text:p>
        </text:list-item>
      </text:list>
      <text:p text:style-name="P106"/>
      <text:p text:style-name="P106">Now this density curve tells us many things like for this histogram we want to know how much percent of data we have for the people aging between 80-100 we can easily tell that. We will be learning a concept known as z-<text:span text:style-name="T29">score</text:span> from it we can easily tell these types of data. For now we have understood how this curve is made.</text:p>
      <text:p text:style-name="P106"/>
      <text:p text:style-name="P106"/>
      <text:p text:style-name="P106"/>
      <text:p text:style-name="P106"/>
      <text:p text:style-name="P106"/>
      <text:p text:style-name="P106"/>
      <text:p text:style-name="P106"/>
      <text:p text:style-name="P107"><text:soft-page-break/>Types Of Curves:</text:p>
      <text:p text:style-name="P107"/>
      <text:p text:style-name="P107">Symmetrical Distribution:</text:p>
      <text:p text:style-name="P106">Symmetrical Distribution also known as Normal Distribution or Gaussian Distribution. </text:p>
      <text:p text:style-name="P98"/>
      <text:p text:style-name="P98"><draw:frame draw:style-name="fr3" draw:name="Image45" text:anchor-type="char" svg:width="5.2752in" svg:height="2.8in" draw:z-index="44"><draw:image xlink:href="Pictures/1000000100000279000001502246A8A2.png" xlink:type="simple" xlink:show="embed" xlink:actuate="onLoad" draw:mime-type="image/png"/></draw:frame></text:p>
      <text:p text:style-name="P106">The center line u can see in the picture in this distribution this is the mean median and mode.</text:p>
      <text:p text:style-name="P106">Let me explain this concept in the data if the data is normal its obvious the mean or the average value of data would be something that is center of them. Median is already the center of the data. Mode u can see in the picture that the density curve is at its peak in the center so that possibly means the value is repeated in the data that’s why it is at its peak. This explains how mean , median and mode lies in the center of this data.</text:p>
      <text:p text:style-name="P106"/>
      <text:p text:style-name="P106">In this distribution u can see both sides right and left sides are equal. This is the thing for this distribution that they are equally distributed in both sides left side and right side.</text:p>
      <text:p text:style-name="P106"/>
      <text:p text:style-name="P108">This distribution always forms a bell shaped curve. We will talk about this distribution in the upcoming chapters.</text:p>
      <text:p text:style-name="P108"/>
      <text:p text:style-name="P108"/>
      <text:p text:style-name="P108"/>
      <text:p text:style-name="P108"/>
      <text:p text:style-name="P108"/>
      <text:p text:style-name="P108"/>
      <text:p text:style-name="P109"><text:soft-page-break/><text:span text:style-name="T30">Righ</text:span>t Skewed Distribution And <text:span text:style-name="T30">Left</text:span> Skewed Distribution:</text:p>
      <text:p text:style-name="P109"/>
      <text:p text:style-name="P110">First lets see what skewness is before discussing these distributions.</text:p>
      <text:p text:style-name="P111">Skewness:</text:p>
      <text:p text:style-name="P110">It is the measure of the asymmetry or imbalance in a dataset. In a perfectly balanced data such as normal distribution. The data is perfectly balanced and aligned means that the mean median mode are aligned too. When a data is skewed it indicates that the distribution is not a mirror image on both sides meaning that the data is tilted or spread out more towards either lower or higher values.</text:p>
      <text:p text:style-name="P112">When the data is skewed your mean,median and mode appears to be a bit unbalanced as u can see in the picture below how those all are unbalanced in the below right skewed distribution.</text:p>
      <text:p text:style-name="P112"/>
      <text:p text:style-name="P111">Right Skewed Distribution:</text:p>
      <text:p text:style-name="P110">A right skewed distribution is a dis<draw:frame draw:style-name="fr2" draw:name="Image46" text:anchor-type="char" svg:x="3.5811in" svg:y="0in" svg:width="3.4417in" svg:height="1.3925in" draw:z-index="45"><draw:image xlink:href="Pictures/100000010000024A000000ED743C6D72.png" xlink:type="simple" xlink:show="embed" xlink:actuate="onLoad" draw:mime-type="image/png"/></draw:frame>tribution where the mostly data lies in the left direction. Meaning that the distribution is properly being made on the left side and on the right side the data is skewed it could be due to many things such as outliers or anything else. Then the distribution is said to right skewed.</text:p>
      <text:p text:style-name="P110"/>
      <text:p text:style-name="P113"><text:span text:style-name="T31">Lef</text:span>t Skewed Distribution:<draw:frame draw:style-name="fr2" draw:name="Image47" text:anchor-type="char" svg:x="3.748in" svg:y="0.1811in" svg:width="3.4602in" svg:height="1.4in" draw:z-index="46"><draw:image xlink:href="Pictures/10000000000007B40000031EB53FF66C.png" xlink:type="simple" xlink:show="embed" xlink:actuate="onLoad" draw:mime-type="image/png"/></draw:frame></text:p>
      <text:p text:style-name="P114">A <text:span text:style-name="T31">left</text:span> skewed distribution is a distribution where the mostly data lies in the <text:span text:style-name="T31">righ</text:span>t direction. Meaning that the distribution is properly being made on the <text:span text:style-name="T31">right</text:span> side and on the <text:span text:style-name="T31">left</text:span> side the data is skewed it could be due to many things such as outliers or anything else. Then the distribution is said to <text:span text:style-name="T31">left</text:span> skewed.</text:p>
      <text:p text:style-name="P115"/>
      <text:p text:style-name="P112">NOTE:</text:p>
      <text:list text:style-name="L4">
        <text:list-item>
          <text:p text:style-name="P116">Mean <text:span text:style-name="T32">w</text:span>ill always lie close to the tail.</text:p>
        </text:list-item>
        <text:list-item>
          <text:p text:style-name="P116">Mode will be there where most of data exist. </text:p>
        </text:list-item>
        <text:list-item>
          <text:p text:style-name="P116">Median will be in the center as usual.</text:p>
          <text:p text:style-name="P116"><draw:frame draw:style-name="fr2" draw:name="Image48" text:anchor-type="char" svg:x="0.3799in" svg:y="-0.3634in" svg:width="5.9445in" svg:height="0.9835in" draw:z-index="47"><draw:image xlink:href="Pictures/100000010000029F0000006F2C3E3DD1.png" xlink:type="simple" xlink:show="embed" xlink:actuate="onLoad" draw:mime-type="image/png"/></draw:frame><draw:frame draw:style-name="fr2" draw:name="Image49" text:anchor-type="char" svg:x="3.3571in" svg:y="0.7602in" svg:width="3.4791in" svg:height="2.1591in" draw:z-index="48"><draw:image xlink:href="Pictures/10000001000002B5000001AE6E05B3FA.png" xlink:type="simple" xlink:show="embed" xlink:actuate="onLoad" draw:mime-type="image/png"/></draw:frame><text:soft-page-break/></text:p>
        </text:list-item>
      </text:list>
      <text:p text:style-name="P117">If we need to calculate the central tendency of a skewed data we need to calculate median. But if its for normal distribution we will need to calculate mean first.</text:p>
      <text:p text:style-name="P117">And if u are calculating measure of spread for skewed data we need to calculate the IQR and for normal distribution its better to calculate standard deviation firs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Z-Score:</text:p>
      <text:p text:style-name="P119">Now we have already seen the normal distribution and they are very important in data as well as probability distribution.</text:p>
      <text:p text:style-name="P119">The area under the normal distribution is always 100% or 1.</text:p>
      <text:p text:style-name="P120">(100% = 1, 99% = 0.9)</text:p>
      <text:p text:style-name="P119"><draw:frame draw:style-name="fr2" draw:name="Image50" text:anchor-type="char" svg:x="1.0925in" svg:y="0.1591in" svg:width="4.5083in" svg:height="1.8335in" draw:z-index="49"><draw:image xlink:href="Pictures/100000010000021D000000DC3A4D5C6D.png" xlink:type="simple" xlink:show="embed" xlink:actuate="onLoad" draw:mime-type="image/png"/></draw:frame></text:p>
      <text:p text:style-name="P110"/>
      <text:p text:style-name="P121"/>
      <text:p text:style-name="P121"/>
      <text:p text:style-name="P121"/>
      <text:p text:style-name="P121"/>
      <text:p text:style-name="P121"/>
      <text:p text:style-name="P121"/>
      <text:p text:style-name="P120"><text:s/></text:p>
      <text:p text:style-name="P122">Now this normal distribution follows a formula known as Empirical Formula. Its basically a kind of rule that <text:span text:style-name="T33">is</text:span> followed in Normal distribution. The rule is simple 68-95-99.7 rule.</text:p>
      <text:p text:style-name="P123">You might be thinking what are these numeric things here don’t worry I got<text:span text:style-name="T34">ch</text:span><text:span text:style-name="T33">u</text:span>.<draw:frame draw:style-name="fr2" draw:name="Image51" text:anchor-type="char" svg:x="2.9681in" svg:y="0.25in" svg:width="4.0835in" svg:height="1.8181in" draw:z-index="50"><draw:image xlink:href="Pictures/1000000100000263000001104AFCC9AF.png" xlink:type="simple" xlink:show="embed" xlink:actuate="onLoad" draw:mime-type="image/png"/></draw:frame></text:p>
      <text:p text:style-name="P123">We divide the distribution into 3 section following the Empirical Rule.</text:p>
      <text:p text:style-name="P123"/>
      <text:p text:style-name="P123"/>
      <text:p text:style-name="P123"/>
      <text:p text:style-name="P123"/>
      <text:p text:style-name="P124">The percentage means <text:span text:style-name="T33">probably </text:span>this amount of data lies between these. Like if u see the bl<text:span text:style-name="T33">ue</text:span> arrows in between that <text:span text:style-name="T33">there is a probability that</text:span> 68% data lies similarly for green lines and arrow<text:span text:style-name="T33">s there is a probability that</text:span> 95% of data lies <text:span text:style-name="T33">here</text:span> and for red arrows and line <text:span text:style-name="T33">there is a probability that</text:span> 99.7% data <text:span text:style-name="T35">probability</text:span> lies <text:span text:style-name="T33">here</text:span>.</text:p>
      <text:p text:style-name="P123"><draw:frame draw:style-name="fr2" draw:name="Image52" text:anchor-type="char" svg:x="3.5256in" svg:y="0.1591in" svg:width="3.5862in" svg:height="1.5965in" draw:z-index="51"><draw:image xlink:href="Pictures/1000000100000263000001109D46B475.png" xlink:type="simple" xlink:show="embed" xlink:actuate="onLoad" draw:mime-type="image/png"/></draw:frame></text:p>
      <text:p text:style-name="P123">Now a question might rise like how these lines are divided? The simple answer to this question is these lines are divided using standard deviation points.</text:p>
      <text:p text:style-name="P123">Means that we will have a data and from that data we will be calculating the standard deviation points. Then we will be doing <text:soft-page-break/>what is like draw lines from the standard deviation point 1 on the left side of mean to the right side of mean here we got our first point similarly a point after the first standard deviation point from the right side and left side here 95% data will lie then for the third one we will do the same. This all will be done when the distribution is normal and a bell shaped curve is formed.</text:p>
      <text:p text:style-name="P123"/>
      <text:p text:style-name="P125">These percentage means like the probability of getting 68% data lies here then 95% here and 99.7% lies here.</text:p>
      <text:p text:style-name="P125"/>
      <text:p text:style-name="P125">In short the probability of getting 68% data lies between std point 1 on both sides. 95% probability of getting data lies between std point 2 on both sides similarly for the 99.7% percent probability of getting data lies between std point 3 on both sides.</text:p>
      <text:p text:style-name="P125"/>
      <text:p text:style-name="P125"/>
      <text:p text:style-name="P126">Now lets see this with an example of a consistent data</text:p>
      <text:p text:style-name="P126">1,2,3,4,5,6,7,8,9</text:p>
      <text:p text:style-name="P126"/>
      <text:p text:style-name="P101">(Detailed calculation is done in the notebook)</text:p>
      <text:p text:style-name="P99">Mean = <text:span text:style-name="T5">5</text:span><draw:frame draw:style-name="fr2" draw:name="Image53" text:anchor-type="char" svg:x="3.6646in" svg:y="0.1898in" svg:width="3.4839in" svg:height="1.8756in" draw:z-index="52"><draw:image xlink:href="Pictures/10000001000001FD000001123FC8FC7D.png" xlink:type="simple" xlink:show="embed" xlink:actuate="onLoad" draw:mime-type="image/png"/></draw:frame></text:p>
      <text:p text:style-name="P99">Standard Deviation = <text:span text:style-name="T5">2.73</text:span></text:p>
      <text:p text:style-name="P101">Now for plotting we will keep 5 as center and subtract 5 from 2.73 for left side. And add 2.73 with 5 for right side. 5 will be center because its the mean. </text:p>
      <text:p text:style-name="P101">5 will be subtracted or added then the new value that we will get in that value we will add or subtract the standard deviation.</text:p>
      <text:p text:style-name="P123"/>
      <text:p text:style-name="P123"/>
      <text:p text:style-name="P123"/>
      <text:p text:style-name="P127"/>
      <text:p text:style-name="P121"/>
      <text:p text:style-name="P121"/>
      <text:p text:style-name="P121"/>
      <text:p text:style-name="P128">\</text:p>
      <text:p text:style-name="P128"/>
      <text:p text:style-name="P129"><draw:frame draw:style-name="fr2" draw:name="Image56" text:anchor-type="char" svg:x="0.0417in" svg:y="4.2618in" svg:width="6.6929in" svg:height="0.8283in" draw:z-index="55"><draw:image xlink:href="Pictures/10000001000004930000009185934DB5.png" xlink:type="simple" xlink:show="embed" xlink:actuate="onLoad" draw:mime-type="image/png"/></draw:frame><draw:frame draw:style-name="fr2" draw:name="Image55" text:anchor-type="char" svg:x="0.0374in" svg:y="2.3201in" svg:width="6.8681in" svg:height="1.7402in" draw:z-index="54"><draw:image xlink:href="Pictures/10000001000002FF000001268F991DC5.png" xlink:type="simple" xlink:show="embed" xlink:actuate="onLoad" draw:mime-type="image/png"/></draw:frame><draw:frame draw:style-name="fr2" draw:name="Image54" text:anchor-type="char" svg:x="0.0043in" svg:y="0.1736in" svg:width="6.8764in" svg:height="2.0083in" draw:z-index="53"><draw:image xlink:href="Pictures/10000001000003060000014642F267C1.png" xlink:type="simple" xlink:show="embed" xlink:actuate="onLoad" draw:mime-type="image/png"/></draw:frame><text:soft-page-break/><text:span text:style-name="T36">In</text:span><text:span text:style-name="T37"> simple words this means that it is not necessary that the data lies between three standard deviation points in real life it may differ it could be due to an outlier which can cause things to behave differently. For proper understanding read all three attached pictures. In the above example we can clearly see all the data lies between 3 std points.</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Now let’s discuss what <text:span text:style-name="T1">Z-Score is :</text:span></text:p>
      <text:p text:style-name="P131"><text:span text:style-name="T5">A</text:span> Z-Score <text:span text:style-name="T5">is a powerful statistic tool which is used for measuring how far a data point is from the mean of a dataset, it is measured in terms of standard deviations.</text:span></text:p>
      <text:p text:style-name="P130"><draw:frame draw:style-name="fr2" draw:name="Image57" text:anchor-type="char" svg:x="3.3071in" svg:y="0.0417in" svg:width="3.6626in" svg:height="1.3173in" draw:z-index="56"><draw:image xlink:href="Pictures/100000010000032900000123994D5BCD.png" xlink:type="simple" xlink:show="embed" xlink:actuate="onLoad" draw:mime-type="image/png"/></draw:frame></text:p>
      <text:p text:style-name="P130">From the attached example we have a dat in which by using z-score we will measure how much far the data point 9 is from the mean. It is measured using standard deviation.</text:p>
      <text:p text:style-name="P130"/>
      <text:p text:style-name="P131">Formula Of Z-Score:</text:p>
      <text:p text:style-name="P131">Z-Score = <text:span text:style-name="T38">(</text:span><text:span text:style-name="T5">data point – mean)/standard deviation</text:span></text:p>
      <text:p text:style-name="P130"/>
      <text:p text:style-name="P132">To understand this we will be using an example data point we have is 9.5 and mean for it is suppose it is 8 and standard deviation is 1 (usually 1 is not the standard deviation is using just for easy calculation). Now lets calculate the z-score</text:p>
      <text:p text:style-name="P132"/>
      <text:p text:style-name="P133">Z-Score = <text:span text:style-name="T5">(9.5-8)/1 </text:span>= <text:span text:style-name="T5">1.5</text:span></text:p>
      <text:p text:style-name="P132"/>
      <text:p text:style-name="P132">This means 9.5 is 1.5 standard deviation away from the mean.</text:p>
      <text:p text:style-name="P132">If the z-score value is positive then it means its on the right side of the mean if the value is negative then it means its on the left side of the mean.</text:p>
      <text:p text:style-name="P132"/>
      <text:p text:style-name="P134">Z-Score <text:span text:style-name="T5">can also calculate the total percentage of data below a specific point. To do this we will use z-score table.</text:span></text:p>
      <text:p text:style-name="P135">For seeing the z-table go to chrome and search z-table there will be multiple sites available. Coming towards our example first we calculate our z-score which was 1.5 and then we look at z-table we will search 1.5 since we have nothing after 1.5 we will look at 0 and the value for that is 0.9<draw:frame draw:style-name="fr2" draw:name="Image58" text:anchor-type="char" svg:x="3.9256in" svg:y="1.1366in" svg:width="2.9417in" svg:height="1.8083in" draw:z-index="57"><draw:image xlink:href="Pictures/1000000100000161000000D9D54EF373.png" xlink:type="simple" xlink:show="embed" xlink:actuate="onLoad" draw:mime-type="image/png"/></draw:frame>332.</text:p>
      <text:p text:style-name="P135">This means that the <text:span text:style-name="T39">data below that point holds 93.32% data. To determine how much data is above that point simply we will be subtracting 100-93.32 = 6.68% data lies above this point</text:span></text:p>
      <text:p text:style-name="P136"><text:soft-page-break/>PROBABILITY</text:p>
      <text:p text:style-name="P137">Think about probability like of an event occurring as a likelihood that it could occur.</text:p>
      <text:p text:style-name="P138">Probability = Likelihood</text:p>
      <text:p text:style-name="P137">For example like probability of rolling 6 on a dice.</text:p>
      <text:p text:style-name="P137">Statistics and probability goes hand in hand because stats is about data and analysis of data.</text:p>
      <text:p text:style-name="P137">Probability is going to allow us to determine how reliable our statistical result actually are.</text:p>
      <text:p text:style-name="P137">So for that reason we will be studying probability and stats together.</text:p>
      <text:p text:style-name="P137"/>
      <text:p text:style-name="P138">Road-map of what we will study in Probability</text:p>
      <text:p text:style-name="P138"/>
      <text:p text:style-name="P139">Step 1 – <text:span text:style-name="T5">Basics Probability Concepts</text:span></text:p>
      <text:p text:style-name="P139">Step 2 – <text:span text:style-name="T5">Types Of Events</text:span></text:p>
      <text:p text:style-name="P139">Step 3 – <text:span text:style-name="T5">Probability Rules</text:span></text:p>
      <text:p text:style-name="P139">Step 4 – <text:span text:style-name="T5">Conditional Probability</text:span></text:p>
      <text:p text:style-name="P139">Step 5 – <text:span text:style-name="T5">Bayes’ Theorem (Important for ML Algorithm)</text:span></text:p>
      <text:p text:style-name="P137"/>
      <text:p text:style-name="P140">Lets start with probability. A probability always comes between 0 and 1. We can also tell it in percentage form or fraction form its same thing.</text:p>
      <text:p text:style-name="P141">Formula:</text:p>
      <text:p text:style-name="P141">Probability = <text:span text:style-name="T5">True Outcome / Total Outcome</text:span></text:p>
      <text:p text:style-name="P140">Lets take an example of tossing a coin and lets determine the probability of getting heads.</text:p>
      <text:p text:style-name="P140"/>
      <text:p text:style-name="P140">Total Outcome will be 2 as only 2 can come heads or tails. And the true outcome would be 1 because we can only get heads one time.</text:p>
      <text:p text:style-name="P140">P(H) = ½</text:p>
      <text:p text:style-name="P140"/>
      <text:p text:style-name="P140">P(T) = ½</text:p>
      <text:p text:style-name="P140"/>
      <text:p text:style-name="P140">In short there is 50%-50% chance of getting a heads.</text:p>
      <text:p text:style-name="P140"/>
      <text:p text:style-name="P140">What is the probability of getting a 4 when we roll a dice?</text:p>
      <text:p text:style-name="P140">P(4) = 1/6 =&gt; 1 because we can only get 4 one times, while for 6 its the total outcome is 6 because we can get 6 occurrence when we roll a dice simple. SO the chance of getting 4 is 16.6%</text:p>
      <text:p text:style-name="P142"><text:soft-page-break/>TYPE OF EVENTS IN PROBABILITY</text:p>
      <text:p text:style-name="P143"/>
      <text:p text:style-name="P140"/>
      <text:p text:style-name="P137"><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omic Relief" fo:font-family="'Comic Relief'" style:font-pitch="variable" fo:font-size="16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23T16:57:18.330067219</dc:date>
    <meta:editing-duration>PT58M8S</meta:editing-duration>
    <meta:editing-cycles>9</meta:editing-cycles>
    <meta:generator>LibreOffice/26.2.4.2$Linux_X86_64 LibreOffice_project/620$Build-2</meta:generator>
    <meta:document-statistic meta:table-count="2" meta:image-count="58" meta:object-count="0" meta:page-count="35" meta:paragraph-count="308" meta:word-count="5084" meta:character-count="27528" meta:non-whitespace-character-count="22452"/>
  </office:meta>
</office:document-meta>
</file>