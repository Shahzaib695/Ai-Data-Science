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BF00000248F9604F61.png" manifest:media-type="image/png"/>
  <manifest:file-entry manifest:full-path="Pictures/10000001000002C700000103910FC4F7.png" manifest:media-type="image/png"/>
  <manifest:file-entry manifest:full-path="Pictures/10000001000001F1000000E1D43831DF.png" manifest:media-type="image/png"/>
  <manifest:file-entry manifest:full-path="Pictures/1000000100000228000001D364F0D847.png" manifest:media-type="image/png"/>
  <manifest:file-entry manifest:full-path="Pictures/10000001000001740000019A42CB35C1.png" manifest:media-type="image/png"/>
  <manifest:file-entry manifest:full-path="Pictures/10000001000002E9000001E3278CF33D.png" manifest:media-type="image/png"/>
  <manifest:file-entry manifest:full-path="Pictures/10000001000001BE00000047B1DE7FBA.png" manifest:media-type="image/png"/>
  <manifest:file-entry manifest:full-path="Pictures/10000001000001BE0000012B0A3E2C15.png" manifest:media-type="image/png"/>
  <manifest:file-entry manifest:full-path="Pictures/10000001000002520000019D73C130F8.png" manifest:media-type="image/png"/>
  <manifest:file-entry manifest:full-path="Pictures/10000001000003E7000002348E2DFB15.png" manifest:media-type="image/png"/>
  <manifest:file-entry manifest:full-path="Pictures/10000001000002B5000000F59447C3E4.png" manifest:media-type="image/png"/>
  <manifest:file-entry manifest:full-path="Pictures/10000001000000FF000002297D001C4B.png" manifest:media-type="image/png"/>
  <manifest:file-entry manifest:full-path="Pictures/10000001000001BE0000012B0EE9DB44.png" manifest:media-type="image/png"/>
  <manifest:file-entry manifest:full-path="Pictures/100000010000018E00000183C87A9BC6.png" manifest:media-type="image/png"/>
  <manifest:file-entry manifest:full-path="Pictures/1000000100000301000000902ADBB0B1.png" manifest:media-type="image/png"/>
  <manifest:file-entry manifest:full-path="Pictures/100000010000043500000301E3429DD4.png" manifest:media-type="image/png"/>
  <manifest:file-entry manifest:full-path="Pictures/10000001000000E00000008B852113A3.png" manifest:media-type="image/png"/>
  <manifest:file-entry manifest:full-path="Pictures/10000001000001540000015850258742.png" manifest:media-type="image/png"/>
  <manifest:file-entry manifest:full-path="Pictures/10000001000003090000016DCF9C16F4.png" manifest:media-type="image/png"/>
  <manifest:file-entry manifest:full-path="Pictures/10000001000001E000000113A4943405.png" manifest:media-type="image/png"/>
  <manifest:file-entry manifest:full-path="Pictures/10000001000003870000019F25817216.png" manifest:media-type="image/png"/>
  <manifest:file-entry manifest:full-path="Pictures/10000001000002C1000001280F38401E.png" manifest:media-type="image/png"/>
  <manifest:file-entry manifest:full-path="Pictures/1000000100000154000000AB74C911DB.png" manifest:media-type="image/png"/>
  <manifest:file-entry manifest:full-path="Pictures/10000001000002B5000000F5E40D765D.png" manifest:media-type="image/png"/>
  <manifest:file-entry manifest:full-path="Pictures/10000001000001830000014821FA04B3.png" manifest:media-type="image/png"/>
  <manifest:file-entry manifest:full-path="Pictures/10000001000001870000004005F05F85.png" manifest:media-type="image/png"/>
  <manifest:file-entry manifest:full-path="Pictures/10000001000001A4000000BE418F687D.png" manifest:media-type="image/png"/>
  <manifest:file-entry manifest:full-path="Pictures/10000001000003680000008ED1CC5314.png" manifest:media-type="image/png"/>
  <manifest:file-entry manifest:full-path="Pictures/10000001000001DA000000814A583CCA.png" manifest:media-type="image/png"/>
  <manifest:file-entry manifest:full-path="Pictures/10000001000003650000032290A0B79F.png" manifest:media-type="image/png"/>
  <manifest:file-entry manifest:full-path="Pictures/10000001000002C50000008AAE93222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omic Relief" svg:font-family="'Comic Relief'"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4.9333in" fo:margin-left="1.0208in" table:align="left"/>
    </style:style>
    <style:style style:name="Table1.A" style:family="table-column">
      <style:table-column-properties style:column-width="1.6417in"/>
    </style:style>
    <style:style style:name="Table1.B" style:family="table-column">
      <style:table-column-properties style:column-width="1.7333in"/>
    </style:style>
    <style:style style:name="Table1.C" style:family="table-column">
      <style:table-column-properties style:column-width="1.5583in"/>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2" style:family="table">
      <style:table-properties style:width="6.6931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padding="0.0382in" fo:border-left="0.5pt solid #000000" fo:border-right="none" fo:border-top="0.5pt solid #000000" fo:border-bottom="0.5pt solid #000000"/>
    </style:style>
    <style:style style:name="Table2.D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P1" style:family="paragraph" style:parent-style-name="Standard">
      <style:text-properties style:font-name="Comic Relief" fo:font-size="16pt" fo:font-weight="bold" officeooo:rsid="0001394d" officeooo:paragraph-rsid="0001394d" style:font-size-asian="16pt" style:font-weight-asian="bold" style:font-size-complex="16pt" style:font-weight-complex="bold"/>
    </style:style>
    <style:style style:name="P2" style:family="paragraph" style:parent-style-name="Standard">
      <style:text-properties style:font-name="Comic Relief" fo:font-size="16pt" fo:font-weight="normal" officeooo:rsid="0001394d" officeooo:paragraph-rsid="0001394d" style:font-size-asian="16pt" style:font-weight-asian="normal" style:font-size-complex="16pt" style:font-weight-complex="normal"/>
    </style:style>
    <style:style style:name="P3" style:family="paragraph" style:parent-style-name="Table_20_Contents">
      <style:text-properties style:font-name="Comic Relief" fo:font-size="16pt" style:font-size-asian="16pt" style:font-size-complex="16pt"/>
    </style:style>
    <style:style style:name="P4" style:family="paragraph" style:parent-style-name="Table_20_Contents">
      <style:paragraph-properties fo:text-align="center" style:justify-single-word="false"/>
      <style:text-properties style:font-name="Comic Relief" fo:font-size="16pt" fo:font-weight="bold" officeooo:rsid="0001394d" officeooo:paragraph-rsid="0001394d" style:font-size-asian="16pt" style:font-weight-asian="bold" style:font-size-complex="16pt" style:font-weight-complex="bold"/>
    </style:style>
    <style:style style:name="P5" style:family="paragraph" style:parent-style-name="Table_20_Contents">
      <style:paragraph-properties fo:text-align="center" style:justify-single-word="false"/>
      <style:text-properties style:font-name="Comic Relief" fo:font-size="16pt" fo:font-weight="normal" officeooo:rsid="0001394d" officeooo:paragraph-rsid="0001394d" style:font-size-asian="16pt" style:font-weight-asian="normal" style:font-size-complex="16pt" style:font-weight-complex="normal"/>
    </style:style>
    <style:style style:name="P6" style:family="paragraph" style:parent-style-name="Table_20_Contents">
      <style:paragraph-properties fo:text-align="center" style:justify-single-word="false"/>
      <style:text-properties style:font-name="Comic Relief" fo:font-size="16pt" officeooo:rsid="0001394d" officeooo:paragraph-rsid="0001394d" style:font-size-asian="16pt" style:font-size-complex="16pt"/>
    </style:style>
    <style:style style:name="P7" style:family="paragraph" style:parent-style-name="Standard">
      <style:text-properties style:font-name="Comic Relief" fo:font-size="16pt" fo:font-weight="normal" officeooo:rsid="000334f6" officeooo:paragraph-rsid="000334f6" style:font-size-asian="16pt" style:font-weight-asian="normal" style:font-size-complex="16pt" style:font-weight-complex="normal"/>
    </style:style>
    <style:style style:name="P8" style:family="paragraph" style:parent-style-name="Standard">
      <style:text-properties style:font-name="Comic Relief" fo:font-size="16pt" fo:font-weight="bold" officeooo:rsid="000334f6" officeooo:paragraph-rsid="000334f6" style:font-size-asian="16pt" style:font-weight-asian="bold" style:font-size-complex="16pt" style:font-weight-complex="bold"/>
    </style:style>
    <style:style style:name="P9" style:family="paragraph" style:parent-style-name="Standard">
      <style:paragraph-properties fo:text-align="center" style:justify-single-word="false"/>
      <style:text-properties style:font-name="Comic Relief" fo:font-size="28pt" style:text-underline-style="solid" style:text-underline-width="auto" style:text-underline-color="font-color" fo:font-weight="bold" officeooo:rsid="0003693f" officeooo:paragraph-rsid="0003693f" style:font-size-asian="28pt" style:font-weight-asian="bold" style:font-size-complex="28pt" style:font-weight-complex="bold"/>
    </style:style>
    <style:style style:name="P10" style:family="paragraph" style:parent-style-name="Standard">
      <style:text-properties style:font-name="Comic Relief" fo:font-size="16pt" fo:font-weight="bold" officeooo:rsid="0003693f" officeooo:paragraph-rsid="0003693f" style:font-size-asian="16pt" style:font-weight-asian="bold" style:font-size-complex="16pt" style:font-weight-complex="bold"/>
    </style:style>
    <style:style style:name="P11" style:family="paragraph" style:parent-style-name="Standard">
      <style:text-properties style:font-name="Comic Relief" fo:font-size="16pt" style:text-underline-style="solid" style:text-underline-width="auto" style:text-underline-color="font-color" fo:font-weight="bold" officeooo:rsid="0003693f" officeooo:paragraph-rsid="0003693f" style:font-size-asian="16pt" style:font-weight-asian="bold" style:font-size-complex="16pt" style:font-weight-complex="bold"/>
    </style:style>
    <style:style style:name="P12" style:family="paragraph" style:parent-style-name="Standard">
      <style:text-properties style:font-name="Comic Relief" fo:font-size="16pt" fo:font-weight="normal" officeooo:rsid="0003693f" officeooo:paragraph-rsid="0003693f" style:font-size-asian="16pt" style:font-weight-asian="normal" style:font-size-complex="16pt" style:font-weight-complex="normal"/>
    </style:style>
    <style:style style:name="P13" style:family="paragraph" style:parent-style-name="Standard">
      <style:text-properties style:font-name="Comic Relief" fo:font-size="16pt" style:text-underline-style="solid" style:text-underline-width="auto" style:text-underline-color="font-color" fo:font-weight="bold" officeooo:rsid="000478d2" officeooo:paragraph-rsid="0003693f" style:font-size-asian="16pt" style:font-weight-asian="bold" style:font-size-complex="16pt" style:font-weight-complex="bold"/>
    </style:style>
    <style:style style:name="P14" style:family="paragraph" style:parent-style-name="Standard">
      <style:text-properties style:font-name="Comic Relief" fo:font-size="16pt" style:text-underline-style="solid" style:text-underline-width="auto" style:text-underline-color="font-color" fo:font-weight="bold" officeooo:rsid="000478d2" officeooo:paragraph-rsid="000478d2" style:font-size-asian="16pt" style:font-weight-asian="bold" style:font-size-complex="16pt" style:font-weight-complex="bold"/>
    </style:style>
    <style:style style:name="P15" style:family="paragraph" style:parent-style-name="Standard">
      <style:text-properties style:font-name="Comic Relief" fo:font-size="16pt" style:text-underline-style="none" fo:font-weight="normal" officeooo:rsid="000478d2" officeooo:paragraph-rsid="000478d2" style:font-size-asian="16pt" style:font-weight-asian="normal" style:font-size-complex="16pt" style:font-weight-complex="normal"/>
    </style:style>
    <style:style style:name="P16" style:family="paragraph" style:parent-style-name="Standard">
      <style:text-properties style:font-name="Comic Relief" fo:font-size="16pt" style:text-underline-style="solid" style:text-underline-width="auto" style:text-underline-color="font-color" fo:font-weight="bold" officeooo:rsid="0005834e" officeooo:paragraph-rsid="0005834e" style:font-size-asian="16pt" style:font-weight-asian="bold" style:font-size-complex="16pt" style:font-weight-complex="bold"/>
    </style:style>
    <style:style style:name="P17" style:family="paragraph" style:parent-style-name="Standard">
      <style:text-properties style:font-name="Comic Relief" fo:font-size="16pt" style:text-underline-style="none" fo:font-weight="normal" officeooo:rsid="0005834e" officeooo:paragraph-rsid="0005834e" style:font-size-asian="16pt" style:font-weight-asian="normal" style:font-size-complex="16pt" style:font-weight-complex="normal"/>
    </style:style>
    <style:style style:name="P18" style:family="paragraph" style:parent-style-name="Standard">
      <style:text-properties style:font-name="Comic Relief" fo:font-size="16pt" style:text-underline-style="none" fo:font-weight="bold" officeooo:rsid="0005834e" officeooo:paragraph-rsid="0005834e" style:font-size-asian="16pt" style:font-weight-asian="bold" style:font-size-complex="16pt" style:font-weight-complex="bold"/>
    </style:style>
    <style:style style:name="P19" style:family="paragraph" style:parent-style-name="Standard">
      <style:text-properties style:font-name="Comic Relief" fo:font-size="16pt" style:text-underline-style="none" fo:font-weight="bold" officeooo:rsid="00071ab3" officeooo:paragraph-rsid="0005834e" style:font-size-asian="16pt" style:font-weight-asian="bold" style:font-size-complex="16pt" style:font-weight-complex="bold"/>
    </style:style>
    <style:style style:name="P20" style:family="paragraph" style:parent-style-name="Standard">
      <style:text-properties style:font-name="Comic Relief" fo:font-size="16pt" style:text-underline-style="none" fo:font-weight="bold" officeooo:rsid="00071ab3" officeooo:paragraph-rsid="00071ab3" style:font-size-asian="16pt" style:font-weight-asian="bold" style:font-size-complex="16pt" style:font-weight-complex="bold"/>
    </style:style>
    <style:style style:name="P21" style:family="paragraph" style:parent-style-name="Standard">
      <style:paragraph-properties fo:text-align="right" style:justify-single-word="false"/>
      <style:text-properties style:font-name="Comic Relief" fo:font-size="16pt" style:text-underline-style="none" fo:font-weight="bold" officeooo:rsid="00071ab3" officeooo:paragraph-rsid="00071ab3" style:font-size-asian="16pt" style:font-weight-asian="bold" style:font-size-complex="16pt" style:font-weight-complex="bold"/>
    </style:style>
    <style:style style:name="P22" style:family="paragraph" style:parent-style-name="Standard">
      <style:text-properties style:font-name="Comic Relief" fo:font-size="16pt" style:text-underline-style="solid" style:text-underline-width="auto" style:text-underline-color="font-color" fo:font-weight="bold" officeooo:rsid="000886cb" officeooo:paragraph-rsid="000886cb" style:font-size-asian="16pt" style:font-weight-asian="bold" style:font-size-complex="16pt" style:font-weight-complex="bold"/>
    </style:style>
    <style:style style:name="P23" style:family="paragraph" style:parent-style-name="Standard">
      <style:text-properties style:font-name="Comic Relief" fo:font-size="16pt" fo:font-style="normal" style:text-underline-style="none" fo:font-weight="normal" officeooo:rsid="000886cb" officeooo:paragraph-rsid="000886cb" style:font-size-asian="16pt" style:font-style-asian="normal" style:font-weight-asian="normal" style:font-size-complex="16pt" style:font-style-complex="normal" style:font-weight-complex="normal"/>
    </style:style>
    <style:style style:name="P24" style:family="paragraph" style:parent-style-name="Standard">
      <style:text-properties style:font-name="Comic Relief" fo:font-size="16pt" fo:font-style="normal" style:text-underline-style="none" fo:font-weight="normal" officeooo:rsid="0008fcf0" officeooo:paragraph-rsid="0008fcf0" style:font-size-asian="16pt" style:font-style-asian="normal" style:font-weight-asian="normal" style:font-size-complex="16pt" style:font-style-complex="normal" style:font-weight-complex="normal"/>
    </style:style>
    <style:style style:name="P25" style:family="paragraph" style:parent-style-name="Standard">
      <style:text-properties style:font-name="Comic Relief" fo:font-size="16pt" style:text-underline-style="none" fo:font-weight="normal" officeooo:rsid="00071ab3" officeooo:paragraph-rsid="00071ab3" style:font-size-asian="16pt" style:font-weight-asian="normal" style:font-size-complex="16pt" style:font-weight-complex="normal"/>
    </style:style>
    <style:style style:name="P26" style:family="paragraph" style:parent-style-name="Standard">
      <style:text-properties style:font-name="Comic Relief" fo:font-size="16pt" style:text-underline-style="none" fo:font-weight="bold" officeooo:rsid="00071ab3" officeooo:paragraph-rsid="000a31be" style:font-size-asian="16pt" style:font-weight-asian="bold" style:font-size-complex="16pt" style:font-weight-complex="bold"/>
    </style:style>
    <style:style style:name="P27" style:family="paragraph" style:parent-style-name="Standard">
      <style:text-properties style:font-name="Comic Relief" fo:font-size="16pt" style:text-underline-style="none" fo:font-weight="bold" officeooo:rsid="00071ab3" officeooo:paragraph-rsid="000a336f" style:font-size-asian="16pt" style:font-weight-asian="bold" style:font-size-complex="16pt" style:font-weight-complex="bold"/>
    </style:style>
    <style:style style:name="P28" style:family="paragraph" style:parent-style-name="Standard">
      <style:text-properties style:font-name="Comic Relief" fo:font-size="16pt" style:text-underline-style="none" fo:font-weight="normal" officeooo:rsid="00071ab3" officeooo:paragraph-rsid="000a336f" style:font-size-asian="16pt" style:font-weight-asian="normal" style:font-size-complex="16pt" style:font-weight-complex="normal"/>
    </style:style>
    <style:style style:name="P29" style:family="paragraph" style:parent-style-name="Standard">
      <style:text-properties style:font-name="Comic Relief" fo:font-size="16pt" style:text-underline-style="none" fo:font-weight="normal" officeooo:rsid="000a336f" officeooo:paragraph-rsid="000a336f" style:font-size-asian="16pt" style:font-weight-asian="normal" style:font-size-complex="16pt" style:font-weight-complex="normal"/>
    </style:style>
    <style:style style:name="P30" style:family="paragraph" style:parent-style-name="Standard">
      <style:text-properties style:font-name="Comic Relief" fo:font-size="16pt" style:text-underline-style="none" fo:font-weight="normal" officeooo:rsid="000bf871" officeooo:paragraph-rsid="000a336f" style:font-size-asian="16pt" style:font-weight-asian="normal" style:font-size-complex="16pt" style:font-weight-complex="normal"/>
    </style:style>
    <style:style style:name="P31" style:family="paragraph" style:parent-style-name="Standard">
      <style:text-properties style:font-name="Comic Relief" fo:font-size="16pt" style:text-underline-style="none" fo:font-weight="normal" officeooo:rsid="000bf871" officeooo:paragraph-rsid="000bf871" style:font-size-asian="16pt" style:font-weight-asian="normal" style:font-size-complex="16pt" style:font-weight-complex="normal"/>
    </style:style>
    <style:style style:name="P32" style:family="paragraph" style:parent-style-name="Standard">
      <style:text-properties style:font-name="Comic Relief" fo:font-size="16pt" style:text-underline-style="none" fo:font-weight="bold" officeooo:rsid="000bf871" officeooo:paragraph-rsid="000bf871" style:font-size-asian="16pt" style:font-weight-asian="bold" style:font-size-complex="16pt" style:font-weight-complex="bold"/>
    </style:style>
    <style:style style:name="P33" style:family="paragraph" style:parent-style-name="Standard">
      <style:text-properties style:font-name="Comic Relief" fo:font-size="16pt" style:text-underline-style="solid" style:text-underline-width="auto" style:text-underline-color="font-color" fo:font-weight="bold" officeooo:rsid="000bf871" officeooo:paragraph-rsid="000bf871" style:font-size-asian="16pt" style:font-weight-asian="bold" style:font-size-complex="16pt" style:font-weight-complex="bold"/>
    </style:style>
    <style:style style:name="P34" style:family="paragraph" style:parent-style-name="Standard">
      <style:paragraph-properties fo:text-align="center" style:justify-single-word="false"/>
      <style:text-properties style:font-name="Comic Relief" fo:font-size="16pt" style:text-underline-style="none" fo:font-weight="bold" officeooo:rsid="000bf871" officeooo:paragraph-rsid="000bf871" style:font-size-asian="16pt" style:font-weight-asian="bold" style:font-size-complex="16pt" style:font-weight-complex="bold"/>
    </style:style>
    <style:style style:name="P35" style:family="paragraph" style:parent-style-name="Standard">
      <style:paragraph-properties fo:text-align="left" style:justify-single-word="false"/>
      <style:text-properties style:font-name="Comic Relief" fo:font-size="16pt" style:text-underline-style="none" fo:font-weight="normal" officeooo:rsid="000d5184" officeooo:paragraph-rsid="000d5184" style:font-size-asian="16pt" style:font-weight-asian="normal" style:font-size-complex="16pt" style:font-weight-complex="normal"/>
    </style:style>
    <style:style style:name="P36" style:family="paragraph" style:parent-style-name="Standard">
      <style:paragraph-properties fo:text-align="left" style:justify-single-word="false"/>
      <style:text-properties style:font-name="Comic Relief" fo:font-size="16pt" style:text-underline-style="none" fo:font-weight="normal" officeooo:rsid="000dbcc2" officeooo:paragraph-rsid="000dbcc2" style:font-size-asian="16pt" style:font-weight-asian="normal" style:font-size-complex="16pt" style:font-weight-complex="normal"/>
    </style:style>
    <style:style style:name="P37" style:family="paragraph" style:parent-style-name="Standard">
      <style:paragraph-properties fo:text-align="left" style:justify-single-word="false"/>
      <style:text-properties style:font-name="Comic Relief" fo:font-size="16pt" style:text-underline-style="none" fo:font-weight="bold" officeooo:rsid="000bf871" officeooo:paragraph-rsid="000bf871" style:font-size-asian="16pt" style:font-weight-asian="bold" style:font-size-complex="16pt" style:font-weight-complex="bold"/>
    </style:style>
    <style:style style:name="P38" style:family="paragraph" style:parent-style-name="Standard">
      <style:paragraph-properties fo:text-align="left" style:justify-single-word="false"/>
      <style:text-properties style:font-name="Comic Relief" fo:font-size="16pt" style:text-underline-style="none" fo:font-weight="bold" officeooo:rsid="000dbcc2" officeooo:paragraph-rsid="000dbcc2" style:font-size-asian="16pt" style:font-weight-asian="bold" style:font-size-complex="16pt" style:font-weight-complex="bold"/>
    </style:style>
    <style:style style:name="P39" style:family="paragraph" style:parent-style-name="Standard">
      <style:paragraph-properties fo:text-align="left" style:justify-single-word="false"/>
      <style:text-properties style:font-name="Comic Relief" fo:font-size="16pt" style:text-underline-style="solid" style:text-underline-width="auto" style:text-underline-color="font-color" fo:font-weight="bold" officeooo:rsid="000dbcc2" officeooo:paragraph-rsid="000dbcc2" style:font-size-asian="16pt" style:font-weight-asian="bold" style:font-size-complex="16pt" style:font-weight-complex="bold"/>
    </style:style>
    <style:style style:name="P40" style:family="paragraph" style:parent-style-name="Standard">
      <style:paragraph-properties fo:text-align="left" style:justify-single-word="false"/>
      <style:text-properties style:font-name="Comic Relief" fo:font-size="16pt" style:text-underline-style="solid" style:text-underline-width="auto" style:text-underline-color="font-color" fo:font-weight="bold" officeooo:rsid="000e827a" officeooo:paragraph-rsid="000e827a" style:font-size-asian="16pt" style:font-weight-asian="bold" style:font-size-complex="16pt" style:font-weight-complex="bold"/>
    </style:style>
    <style:style style:name="P41" style:family="paragraph" style:parent-style-name="Standard">
      <style:paragraph-properties fo:text-align="left" style:justify-single-word="false"/>
      <style:text-properties style:font-name="Comic Relief" fo:font-size="16pt" style:text-underline-style="none" fo:font-weight="normal" officeooo:rsid="000e827a" officeooo:paragraph-rsid="000e827a" style:font-size-asian="16pt" style:font-weight-asian="normal" style:font-size-complex="16pt" style:font-weight-complex="normal"/>
    </style:style>
    <style:style style:name="P42" style:family="paragraph" style:parent-style-name="Standard">
      <style:paragraph-properties fo:text-align="left" style:justify-single-word="false"/>
      <style:text-properties style:font-name="Comic Relief" fo:font-size="16pt" style:text-underline-style="none" fo:font-weight="normal" officeooo:rsid="000ee5af" officeooo:paragraph-rsid="000ee5af" style:font-size-asian="16pt" style:font-weight-asian="normal" style:font-size-complex="16pt" style:font-weight-complex="normal"/>
    </style:style>
    <style:style style:name="P43" style:family="paragraph" style:parent-style-name="Standard">
      <style:paragraph-properties fo:text-align="left" style:justify-single-word="false"/>
      <style:text-properties style:font-name="Comic Relief" fo:font-size="16pt" style:text-underline-style="none" fo:font-weight="bold" officeooo:rsid="0012bc0b" officeooo:paragraph-rsid="0012bc0b" style:font-size-asian="16pt" style:font-weight-asian="bold" style:font-size-complex="16pt" style:font-weight-complex="bold"/>
    </style:style>
    <style:style style:name="P44" style:family="paragraph" style:parent-style-name="Standard">
      <style:paragraph-properties fo:text-align="left" style:justify-single-word="false"/>
      <style:text-properties officeooo:paragraph-rsid="0012bc0b"/>
    </style:style>
    <style:style style:name="P45" style:family="paragraph" style:parent-style-name="Standard">
      <style:paragraph-properties fo:text-align="left" style:justify-single-word="false"/>
      <style:text-properties style:font-name="Comic Relief" fo:font-size="16pt" style:text-underline-style="none" fo:font-weight="normal" officeooo:rsid="0012bc0b" officeooo:paragraph-rsid="0012bc0b" style:font-size-asian="16pt" style:font-weight-asian="normal" style:font-size-complex="16pt" style:font-weight-complex="normal"/>
    </style:style>
    <style:style style:name="P46" style:family="paragraph" style:parent-style-name="Standard">
      <style:paragraph-properties fo:text-align="center" style:justify-single-word="false"/>
      <style:text-properties style:font-name="Comic Relief" fo:font-size="22pt" style:text-underline-style="solid" style:text-underline-width="auto" style:text-underline-color="font-color" fo:font-weight="bold" officeooo:rsid="0012bc0b" officeooo:paragraph-rsid="0012bc0b" style:font-size-asian="22pt" style:font-weight-asian="bold" style:font-size-complex="22pt" style:font-weight-complex="bold"/>
    </style:style>
    <style:style style:name="P47" style:family="paragraph" style:parent-style-name="Standard">
      <style:paragraph-properties fo:text-align="center" style:justify-single-word="false"/>
      <style:text-properties style:font-name="Comic Relief" fo:font-size="16pt" style:text-underline-style="none" fo:font-weight="bold" officeooo:rsid="0012bc0b" officeooo:paragraph-rsid="0012bc0b" style:font-size-asian="16pt" style:font-weight-asian="bold" style:font-size-complex="16pt" style:font-weight-complex="bold"/>
    </style:style>
    <style:style style:name="P48" style:family="paragraph" style:parent-style-name="Standard">
      <style:paragraph-properties fo:text-align="left" style:justify-single-word="false"/>
      <style:text-properties style:font-name="Comic Relief" fo:font-size="16pt" style:text-underline-style="solid" style:text-underline-width="auto" style:text-underline-color="font-color" fo:font-weight="normal" officeooo:rsid="000ee5af" officeooo:paragraph-rsid="000ee5af" style:font-size-asian="16pt" style:font-weight-asian="normal" style:font-size-complex="16pt" style:font-weight-complex="normal"/>
    </style:style>
    <style:style style:name="P49" style:family="paragraph" style:parent-style-name="Standard">
      <style:paragraph-properties fo:text-align="left" style:justify-single-word="false"/>
      <style:text-properties style:font-name="Comic Relief" fo:font-size="16pt" style:text-underline-style="solid" style:text-underline-width="auto" style:text-underline-color="font-color" fo:font-weight="bold" officeooo:rsid="0012f960" officeooo:paragraph-rsid="0012f960" style:font-size-asian="16pt" style:font-weight-asian="bold" style:font-size-complex="16pt" style:font-weight-complex="bold"/>
    </style:style>
    <style:style style:name="P50" style:family="paragraph" style:parent-style-name="Standard">
      <style:paragraph-properties fo:text-align="left" style:justify-single-word="false"/>
      <style:text-properties style:font-name="Comic Relief" fo:font-size="16pt" style:text-underline-style="none" fo:font-weight="normal" officeooo:rsid="0012f960" officeooo:paragraph-rsid="0012f960" style:font-size-asian="16pt" style:font-weight-asian="normal" style:font-size-complex="16pt" style:font-weight-complex="normal"/>
    </style:style>
    <style:style style:name="P51" style:family="paragraph" style:parent-style-name="Standard">
      <style:paragraph-properties fo:text-align="left" style:justify-single-word="false"/>
      <style:text-properties style:font-name="Comic Relief" fo:font-size="16pt" style:text-underline-style="none" fo:font-weight="bold" officeooo:rsid="0012f960" officeooo:paragraph-rsid="0012f960" style:font-size-asian="16pt" style:font-weight-asian="bold" style:font-size-complex="16pt" style:font-weight-complex="bold"/>
    </style:style>
    <style:style style:name="P52" style:family="paragraph" style:parent-style-name="Standard">
      <style:paragraph-properties fo:text-align="left" style:justify-single-word="false"/>
      <style:text-properties style:font-name="Comic Relief" fo:font-size="16pt" style:text-underline-style="none" fo:font-weight="normal" officeooo:rsid="0014d861" officeooo:paragraph-rsid="0014d861" style:font-size-asian="16pt" style:font-weight-asian="normal" style:font-size-complex="16pt" style:font-weight-complex="normal"/>
    </style:style>
    <style:style style:name="P53" style:family="paragraph" style:parent-style-name="Standard">
      <style:paragraph-properties fo:text-align="left" style:justify-single-word="false"/>
      <style:text-properties style:font-name="Comic Relief" fo:font-size="16pt" style:text-underline-style="none" fo:font-weight="bold" officeooo:rsid="0014d861" officeooo:paragraph-rsid="0014d861" style:font-size-asian="16pt" style:font-weight-asian="bold" style:font-size-complex="16pt" style:font-weight-complex="bold"/>
    </style:style>
    <style:style style:name="P54" style:family="paragraph" style:parent-style-name="Standard">
      <style:paragraph-properties fo:text-align="left" style:justify-single-word="false"/>
      <style:text-properties style:font-name="Comic Relief" fo:font-size="16pt" style:text-underline-style="none" fo:font-weight="bold" officeooo:rsid="00153359" officeooo:paragraph-rsid="00153359" style:font-size-asian="16pt" style:font-weight-asian="bold" style:font-size-complex="16pt" style:font-weight-complex="bold"/>
    </style:style>
    <style:style style:name="P55" style:family="paragraph" style:parent-style-name="Standard">
      <style:paragraph-properties fo:text-align="left" style:justify-single-word="false"/>
      <style:text-properties style:font-name="Comic Relief" fo:font-size="16pt" style:text-underline-style="none" fo:font-weight="normal" officeooo:rsid="00153359" officeooo:paragraph-rsid="00153359" style:font-size-asian="16pt" style:font-weight-asian="normal" style:font-size-complex="16pt" style:font-weight-complex="normal"/>
    </style:style>
    <style:style style:name="P56" style:family="paragraph" style:parent-style-name="Standard">
      <style:paragraph-properties fo:text-align="left" style:justify-single-word="false"/>
      <style:text-properties style:font-name="Comic Relief" fo:font-size="16pt" style:text-underline-style="solid" style:text-underline-width="auto" style:text-underline-color="font-color" fo:font-weight="bold" officeooo:rsid="00153359" officeooo:paragraph-rsid="00153359" style:font-size-asian="16pt" style:font-weight-asian="bold" style:font-size-complex="16pt" style:font-weight-complex="bold"/>
    </style:style>
    <style:style style:name="P57" style:family="paragraph" style:parent-style-name="Standard">
      <style:paragraph-properties fo:text-align="left" style:justify-single-word="false"/>
      <style:text-properties style:font-name="Comic Relief" fo:font-size="16pt" style:text-underline-style="solid" style:text-underline-width="auto" style:text-underline-color="font-color" fo:font-weight="bold" officeooo:rsid="0016378d" officeooo:paragraph-rsid="0016378d" style:font-size-asian="16pt" style:font-weight-asian="bold" style:font-size-complex="16pt" style:font-weight-complex="bold"/>
    </style:style>
    <style:style style:name="P58" style:family="paragraph" style:parent-style-name="Standard">
      <style:paragraph-properties fo:text-align="left" style:justify-single-word="false"/>
      <style:text-properties style:font-name="Comic Relief" fo:font-size="16pt" style:text-underline-style="none" fo:font-weight="normal" officeooo:rsid="0016378d" officeooo:paragraph-rsid="0016378d" style:font-size-asian="16pt" style:font-weight-asian="normal" style:font-size-complex="16pt" style:font-weight-complex="normal"/>
    </style:style>
    <style:style style:name="P59" style:family="paragraph" style:parent-style-name="Standard">
      <style:paragraph-properties fo:text-align="left" style:justify-single-word="false"/>
      <style:text-properties style:font-name="Comic Relief" fo:font-size="16pt" style:text-underline-style="none" fo:font-weight="normal" officeooo:rsid="000ee5af" officeooo:paragraph-rsid="0016378d" style:font-size-asian="16pt" style:font-weight-asian="normal" style:font-size-complex="16pt" style:font-weight-complex="normal"/>
    </style:style>
    <style:style style:name="P60" style:family="paragraph" style:parent-style-name="Standard">
      <style:paragraph-properties fo:text-align="left" style:justify-single-word="false"/>
      <style:text-properties style:font-name="Comic Relief" fo:font-size="16pt" style:text-underline-style="none" fo:font-weight="normal" officeooo:rsid="00169dde" officeooo:paragraph-rsid="00169dde" style:font-size-asian="16pt" style:font-weight-asian="normal" style:font-size-complex="16pt" style:font-weight-complex="normal"/>
    </style:style>
    <style:style style:name="P61" style:family="paragraph" style:parent-style-name="Standard">
      <style:paragraph-properties fo:text-align="left" style:justify-single-word="false"/>
      <style:text-properties style:font-name="Comic Relief" fo:font-size="16pt" style:text-underline-style="solid" style:text-underline-width="auto" style:text-underline-color="font-color" fo:font-weight="bold" officeooo:rsid="00169dde" officeooo:paragraph-rsid="00169dde" style:font-size-asian="16pt" style:font-weight-asian="bold" style:font-size-complex="16pt" style:font-weight-complex="bold"/>
    </style:style>
    <style:style style:name="P62" style:family="paragraph" style:parent-style-name="Standard">
      <style:paragraph-properties fo:text-align="left" style:justify-single-word="false"/>
      <style:text-properties style:font-name="Comic Relief" fo:font-size="16pt" style:text-underline-style="none" fo:font-weight="normal" officeooo:rsid="00171cc3" officeooo:paragraph-rsid="00171cc3" style:font-size-asian="16pt" style:font-weight-asian="normal" style:font-size-complex="16pt" style:font-weight-complex="normal"/>
    </style:style>
    <style:style style:name="P63" style:family="paragraph" style:parent-style-name="Standard">
      <style:paragraph-properties fo:text-align="left" style:justify-single-word="false"/>
      <style:text-properties style:font-name="Comic Relief" fo:font-size="16pt" style:text-underline-style="none" fo:font-weight="bold" officeooo:rsid="00171cc3" officeooo:paragraph-rsid="00171cc3" style:font-size-asian="16pt" style:font-weight-asian="bold" style:font-size-complex="16pt" style:font-weight-complex="bold"/>
    </style:style>
    <style:style style:name="P64" style:family="paragraph" style:parent-style-name="Standard">
      <style:paragraph-properties fo:text-align="left" style:justify-single-word="false"/>
      <style:text-properties style:font-name="Comic Relief" fo:font-size="16pt" style:text-underline-style="none" fo:font-weight="normal" officeooo:rsid="0018783d" officeooo:paragraph-rsid="0018783d" style:font-size-asian="16pt" style:font-weight-asian="normal" style:font-size-complex="16pt" style:font-weight-complex="normal"/>
    </style:style>
    <style:style style:name="P65" style:family="paragraph" style:parent-style-name="Standard">
      <style:paragraph-properties fo:text-align="left" style:justify-single-word="false"/>
      <style:text-properties style:font-name="Comic Relief" fo:font-size="16pt" style:text-underline-style="none" fo:font-weight="bold" officeooo:rsid="0018783d" officeooo:paragraph-rsid="0018783d" style:font-size-asian="16pt" style:font-weight-asian="bold" style:font-size-complex="16pt" style:font-weight-complex="bold"/>
    </style:style>
    <style:style style:name="P66" style:family="paragraph" style:parent-style-name="Standard">
      <style:paragraph-properties fo:text-align="left" style:justify-single-word="false"/>
      <style:text-properties style:font-name="Comic Relief" fo:font-size="16pt" style:text-underline-style="none" fo:font-weight="normal" officeooo:rsid="001a7235" officeooo:paragraph-rsid="001a7235" style:font-size-asian="16pt" style:font-weight-asian="normal" style:font-size-complex="16pt" style:font-weight-complex="normal"/>
    </style:style>
    <style:style style:name="P67" style:family="paragraph" style:parent-style-name="Standard" style:list-style-name="L1">
      <style:paragraph-properties fo:text-align="left" style:justify-single-word="false"/>
      <style:text-properties style:font-name="Comic Relief" fo:font-size="16pt" style:text-underline-style="none" fo:font-weight="normal" officeooo:rsid="001a7235" officeooo:paragraph-rsid="001a7235" style:font-size-asian="16pt" style:font-weight-asian="normal" style:font-size-complex="16pt" style:font-weight-complex="normal"/>
    </style:style>
    <style:style style:name="P68" style:family="paragraph" style:parent-style-name="Standard" style:list-style-name="L1">
      <style:paragraph-properties fo:text-align="left" style:justify-single-word="false"/>
      <style:text-properties style:font-name="Comic Relief" fo:font-size="16pt" style:text-underline-style="none" fo:font-weight="normal" officeooo:rsid="001a7235" officeooo:paragraph-rsid="001ae328" style:font-size-asian="16pt" style:font-weight-asian="normal" style:font-size-complex="16pt" style:font-weight-complex="normal"/>
    </style:style>
    <style:style style:name="P69" style:family="paragraph" style:parent-style-name="Standard">
      <style:paragraph-properties fo:text-align="left" style:justify-single-word="false"/>
      <style:text-properties style:font-name="Comic Relief" fo:font-size="16pt" style:text-underline-style="none" fo:font-weight="normal" officeooo:rsid="001ae328" officeooo:paragraph-rsid="001ae328" style:font-size-asian="16pt" style:font-weight-asian="normal" style:font-size-complex="16pt" style:font-weight-complex="normal"/>
    </style:style>
    <style:style style:name="P70" style:family="paragraph" style:parent-style-name="Standard">
      <style:paragraph-properties fo:text-align="left" style:justify-single-word="false"/>
      <style:text-properties style:font-name="Comic Relief" fo:font-size="16pt" style:text-underline-style="none" fo:font-weight="normal" officeooo:rsid="001a7235" officeooo:paragraph-rsid="001ae328" style:font-size-asian="16pt" style:font-weight-asian="normal" style:font-size-complex="16pt" style:font-weight-complex="normal"/>
    </style:style>
    <style:style style:name="P71" style:family="paragraph" style:parent-style-name="Standard">
      <style:paragraph-properties fo:text-align="left" style:justify-single-word="false"/>
      <style:text-properties style:font-name="Comic Relief" fo:font-size="16pt" style:text-underline-style="none" fo:font-weight="normal" officeooo:rsid="001b77f5" officeooo:paragraph-rsid="001b77f5" style:font-size-asian="16pt" style:font-weight-asian="normal" style:font-size-complex="16pt" style:font-weight-complex="normal"/>
    </style:style>
    <style:style style:name="P72" style:family="paragraph" style:parent-style-name="Standard">
      <style:paragraph-properties fo:text-align="left" style:justify-single-word="false" style:writing-mode="lr-tb" style:writing-mode-automatic="false"/>
      <style:text-properties style:font-name="Comic Relief" fo:font-size="16pt" style:text-underline-style="none" fo:font-weight="bold" officeooo:rsid="001d45cd" officeooo:paragraph-rsid="001d45cd" style:font-size-asian="16pt" style:font-weight-asian="bold" style:font-size-complex="16pt" style:font-weight-complex="bold"/>
    </style:style>
    <style:style style:name="P73"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1d45cd" officeooo:paragraph-rsid="001d45cd" style:font-size-asian="16pt" style:font-weight-asian="normal" style:font-size-complex="16pt" style:font-weight-complex="normal"/>
    </style:style>
    <style:style style:name="P74" style:family="paragraph" style:parent-style-name="Standard" style:list-style-name="L2">
      <style:paragraph-properties fo:text-align="left" style:justify-single-word="false" style:writing-mode="lr-tb" style:writing-mode-automatic="false"/>
      <style:text-properties style:font-name="Comic Relief" fo:font-size="16pt" style:text-underline-style="none" fo:font-weight="normal" officeooo:rsid="001d45cd" officeooo:paragraph-rsid="001d45cd" style:font-size-asian="16pt" style:font-weight-asian="normal" style:font-size-complex="16pt" style:font-weight-complex="normal"/>
    </style:style>
    <style:style style:name="P75"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1d45cd" officeooo:paragraph-rsid="001dbcfd" style:font-size-asian="16pt" style:font-weight-asian="normal" style:font-size-complex="16pt" style:font-weight-complex="normal"/>
    </style:style>
    <style:style style:name="P76" style:family="paragraph" style:parent-style-name="Standard">
      <style:paragraph-properties fo:text-align="left" style:justify-single-word="false" style:writing-mode="lr-tb" style:writing-mode-automatic="false"/>
      <style:text-properties style:font-name="Comic Relief" fo:font-size="16pt" style:text-underline-style="none" fo:font-weight="bold" officeooo:rsid="001dbcfd" officeooo:paragraph-rsid="001dbcfd" style:font-size-asian="16pt" style:font-weight-asian="bold" style:font-size-complex="16pt" style:font-weight-complex="bold"/>
    </style:style>
    <style:style style:name="P77"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1dbcfd" officeooo:paragraph-rsid="001dbcfd" style:font-size-asian="16pt" style:font-weight-asian="normal" style:font-size-complex="16pt" style:font-weight-complex="normal"/>
    </style:style>
    <style:style style:name="P78" style:family="paragraph" style:parent-style-name="Standard">
      <style:paragraph-properties fo:text-align="left" style:justify-single-word="false" style:writing-mode="lr-tb" style:writing-mode-automatic="false"/>
      <style:text-properties style:font-name="Comic Relief" fo:font-size="16pt" style:text-underline-style="none" fo:font-weight="bold" officeooo:rsid="001facbb" officeooo:paragraph-rsid="001facbb" style:font-size-asian="16pt" style:font-weight-asian="bold" style:font-size-complex="16pt" style:font-weight-complex="bold"/>
    </style:style>
    <style:style style:name="P79"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1facbb" officeooo:paragraph-rsid="001facbb" style:font-size-asian="16pt" style:font-weight-asian="normal" style:font-size-complex="16pt" style:font-weight-complex="normal"/>
    </style:style>
    <style:style style:name="P80"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20e28b" officeooo:paragraph-rsid="0020e28b" style:font-size-asian="16pt" style:font-weight-asian="normal" style:font-size-complex="16pt" style:font-weight-complex="normal"/>
    </style:style>
    <style:style style:name="P81" style:family="paragraph" style:parent-style-name="Standard">
      <style:paragraph-properties fo:text-align="left" style:justify-single-word="false" style:writing-mode="lr-tb" style:writing-mode-automatic="false"/>
      <style:text-properties style:font-name="Comic Relief" fo:font-size="16pt" style:text-underline-style="none" fo:font-weight="bold" officeooo:rsid="0020e28b" officeooo:paragraph-rsid="0020e28b" style:font-size-asian="16pt" style:font-weight-asian="bold" style:font-size-complex="16pt" style:font-weight-complex="bold"/>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font-weight="normal" style:font-weight-asian="normal" style:font-weight-complex="normal"/>
    </style:style>
    <style:style style:name="T5" style:family="text">
      <style:text-properties officeooo:rsid="0010ffc6"/>
    </style:style>
    <style:style style:name="T6" style:family="text">
      <style:text-properties style:text-underline-style="none"/>
    </style:style>
    <style:style style:name="T7" style:family="text">
      <style:text-properties officeooo:rsid="000a31be"/>
    </style:style>
    <style:style style:name="T8" style:family="text">
      <style:text-properties officeooo:rsid="000a336f"/>
    </style:style>
    <style:style style:name="T9" style:family="text">
      <style:text-properties officeooo:rsid="000bf871"/>
    </style:style>
    <style:style style:name="T10" style:family="text">
      <style:text-properties fo:font-weight="normal" officeooo:rsid="000dbcc2" style:font-weight-asian="normal" style:font-weight-complex="normal"/>
    </style:style>
    <style:style style:name="T11" style:family="text">
      <style:text-properties officeooo:rsid="0021908e"/>
    </style:style>
    <style:style style:name="T12" style:family="text">
      <style:text-properties style:font-name="Comic Relief" fo:font-size="16pt" style:text-underline-style="none" fo:font-weight="bold" officeooo:rsid="0012bc0b" style:font-size-asian="16pt" style:font-weight-asian="bold" style:font-size-complex="16pt" style:font-weight-complex="bold"/>
    </style:style>
    <style:style style:name="T13" style:family="text">
      <style:text-properties style:font-name="Comic Relief" fo:font-size="16pt" style:text-underline-style="none" fo:font-weight="normal" officeooo:rsid="0012bc0b" style:font-size-asian="16pt" style:font-weight-asian="normal" style:font-size-complex="16pt" style:font-weight-complex="normal"/>
    </style:style>
    <style:style style:name="T14" style:family="text">
      <style:text-properties style:font-name="Comic Relief" fo:font-size="16pt" style:font-size-asian="16pt" style:font-size-complex="16pt"/>
    </style:style>
    <style:style style:name="T15" style:family="text">
      <style:text-properties officeooo:rsid="00169dde"/>
    </style:style>
    <style:style style:name="T16" style:family="text">
      <style:text-properties officeooo:rsid="0016378d"/>
    </style:style>
    <style:style style:name="T17" style:family="text">
      <style:text-properties fo:font-weight="bold" officeooo:rsid="0016378d" style:font-weight-asian="bold" style:font-weight-complex="bold"/>
    </style:style>
    <style:style style:name="T18" style:family="text">
      <style:text-properties style:text-position="super 58%"/>
    </style:style>
    <style:style style:name="T19" style:family="text">
      <style:text-properties fo:background-color="#ffff00" loext:char-shading-value="0"/>
    </style:style>
    <style:style style:name="T20" style:family="text">
      <style:text-properties officeooo:rsid="001ae328"/>
    </style:style>
    <style:style style:name="T21" style:family="text">
      <style:text-properties officeooo:rsid="0020e28b"/>
    </style:style>
    <style:style style:name="T22" style:family="text">
      <style:text-properties fo:font-weight="normal" officeooo:rsid="0020e28b"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661in" fo:text-indent="-0.25in" fo:margin-left="0.5661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161in" fo:text-indent="-0.25in" fo:margin-left="0.8161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661in" fo:text-indent="-0.25in" fo:margin-left="1.066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3161in" fo:text-indent="-0.25in" fo:margin-left="1.3161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661in" fo:text-indent="-0.25in" fo:margin-left="1.5661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8161in" fo:text-indent="-0.25in" fo:margin-left="1.8161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661in" fo:text-indent="-0.25in" fo:margin-left="2.0661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3161in" fo:text-indent="-0.25in" fo:margin-left="2.3161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661in" fo:text-indent="-0.25in" fo:margin-left="2.5661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8161in" fo:text-indent="-0.25in" fo:margin-left="2.8161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atistics And Probability:</text:p>
      <text:p text:style-name="P1"/>
      <text:p text:style-name="P1">Data:</text:p>
      <text:p text:style-name="P2">A set of information is called Data. For every operation of analysis,machine learning,deep learning and vice versa we need data to perform operations.</text:p>
      <text:p text:style-name="P2"/>
      <text:p text:style-name="P1">How To Store Data:</text:p>
      <text:p text:style-name="P1"/>
      <text:p text:style-name="P1">Data Table:</text:p>
      <text:p text:style-name="P2">We store data in form of tables which is known as <text:span text:style-name="T1">Data Table</text:span>.</text:p>
      <text:p text:style-name="P2">We also have rows and columns in this data.</text:p>
      <text:p text:style-name="P1"><text:tab/><text:tab/><text:tab/><text:tab/><text:tab/><text:tab/>Columns</text:p>
      <table:table table:name="Table1" table:style-name="Table1">
        <table:table-column table:style-name="Table1.A"/>
        <table:table-column table:style-name="Table1.B"/>
        <table:table-column table:style-name="Table1.C"/>
        <table:table-row>
          <table:table-cell table:style-name="Table1.A1" office:value-type="string">
            <text:p text:style-name="P3"/>
          </table:table-cell>
          <table:table-cell table:style-name="Table1.A1" office:value-type="string">
            <text:p text:style-name="P3"/>
          </table:table-cell>
          <table:table-cell table:style-name="Table1.C1" office:value-type="string">
            <text:p text:style-name="P3"/>
          </table:table-cell>
        </table:table-row>
        <table:table-row>
          <table:table-cell table:style-name="Table1.A2" office:value-type="string">
            <text:p text:style-name="P3"/>
          </table:table-cell>
          <table:table-cell table:style-name="Table1.A2" office:value-type="string">
            <text:p text:style-name="P3"/>
          </table:table-cell>
          <table:table-cell table:style-name="Table1.C2" office:value-type="string">
            <text:p text:style-name="P3"/>
          </table:table-cell>
        </table:table-row>
        <table:table-row>
          <table:table-cell table:style-name="Table1.A2" office:value-type="string">
            <text:p text:style-name="P3"/>
          </table:table-cell>
          <table:table-cell table:style-name="Table1.A2" office:value-type="string">
            <text:p text:style-name="P3"/>
          </table:table-cell>
          <table:table-cell table:style-name="Table1.C2" office:value-type="string">
            <text:p text:style-name="P3"/>
          </table:table-cell>
        </table:table-row>
      </table:table>
      <text:p text:style-name="P1">Rows</text:p>
      <text:p text:style-name="P1"/>
      <text:p text:style-name="P1">One Way Table:</text:p>
      <text:p text:style-name="P1"/>
      <text:p text:style-name="P2">Suppose there are 2 columns one is Name and other is Age. Here we can say Name is a individual and age is a variable because individual has dependencies on multiple things.</text:p>
      <text:p text:style-name="P2"/>
      <table:table table:name="Table2" table:style-name="Table2">
        <table:table-column table:style-name="Table2.A" table:number-columns-repeated="3"/>
        <table:table-column table:style-name="Table2.D"/>
        <table:table-row>
          <table:table-cell table:style-name="Table2.A1" office:value-type="string">
            <text:p text:style-name="P4">Name</text:p>
          </table:table-cell>
          <table:table-cell table:style-name="Table2.A1" office:value-type="string">
            <text:p text:style-name="P4">Age</text:p>
          </table:table-cell>
          <table:table-cell table:style-name="Table2.A1" office:value-type="string">
            <text:p text:style-name="P4">Salary</text:p>
          </table:table-cell>
          <table:table-cell table:style-name="Table2.D1" office:value-type="string">
            <text:p text:style-name="P4">Gender</text:p>
          </table:table-cell>
        </table:table-row>
        <table:table-row>
          <table:table-cell table:style-name="Table2.A2" office:value-type="string">
            <text:p text:style-name="P5">Shahzaib</text:p>
          </table:table-cell>
          <table:table-cell table:style-name="Table2.A2" office:value-type="string">
            <text:p text:style-name="P6">19</text:p>
          </table:table-cell>
          <table:table-cell table:style-name="Table2.A2" office:value-type="string">
            <text:p text:style-name="P6">0</text:p>
          </table:table-cell>
          <table:table-cell table:style-name="Table2.D2" office:value-type="string">
            <text:p text:style-name="P6">M</text:p>
          </table:table-cell>
        </table:table-row>
      </table:table>
      <text:p text:style-name="P2"/>
      <text:p text:style-name="P2">Here in the above table u can see name is acting as individual and others are acting as like variables because when someone asks age about a particular person he/she has to ask it using the name here name act as an independent individual while others act as a variable.</text:p>
      <text:p text:style-name="P2"/>
      <text:p text:style-name="P7">The variables that are divided based on the category we call them<text:span text:style-name="T1"> Qualitative Variables </text:span>while which are not divided in any category we call them as <text:span text:style-name="T1">Quantitative Variables.</text:span> Here in the above example gender is qualitative variable while age and salary are quantitative variables.</text:p>
      <text:p text:style-name="P7"/>
      <text:p text:style-name="P7"/>
      <text:p text:style-name="P7"><text:soft-page-break/>A more proper defination of both are as follows:</text:p>
      <text:p text:style-name="P7"/>
      <text:p text:style-name="P7">So continous numeric data like age,salary,height and etc are known as <text:span text:style-name="T1">Quantitative Variables.</text:span></text:p>
      <text:p text:style-name="P8"/>
      <text:p text:style-name="P7">Where as categorical data like gender,genre and etc are known as <text:span text:style-name="T1">Qualitative Variables.</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text:soft-page-break/>DATA VISUALIZATION</text:p>
      <text:p text:style-name="P10"/>
      <text:p text:style-name="P11">Bar Graph:</text:p>
      <text:p text:style-name="P12">Its the simplest and the most common graph the thing is that if we have data of the most liked fruit by people to manually verify it we need to count it but in statistic we can do it by visualizing a graph.</text:p>
      <text:p text:style-name="P12">To create a bar graph first we need to create a frequency table for fruits.</text:p>
      <text:p text:style-name="P12"><draw:frame draw:style-name="fr1" draw:name="Image1" text:anchor-type="char" svg:width="5.1701in" svg:height="3.6917in" draw:z-index="0"><draw:image xlink:href="Pictures/100000010000043500000301E3429DD4.png" xlink:type="simple" xlink:show="embed" xlink:actuate="onLoad" draw:mime-type="image/png"/></draw:frame>After finding the frequency of the fruit or the count then we can draw horizontal lines each line tells the specific frequency of the fruit we can then easily plot the graph. The underline approach and the plotted graph image are on the next page:</text:p>
      <text:p text:style-name="P12"><draw:frame draw:style-name="fr2" draw:name="Image3" text:anchor-type="char" svg:x="2.9382in" svg:y="0.1874in" svg:width="4.0382in" svg:height="3.4165in" draw:z-index="2"><draw:image xlink:href="Pictures/1000000100000228000001D364F0D847.png" xlink:type="simple" xlink:show="embed" xlink:actuate="onLoad" draw:mime-type="image/png"/></draw:frame></text:p>
      <text:p text:style-name="P12"><draw:frame draw:style-name="fr2" draw:name="Image2" text:anchor-type="char" svg:x="-0.7874in" svg:y="0.0453in" svg:width="4.0689in" svg:height="1.8425in" draw:z-index="1"><draw:image xlink:href="Pictures/10000001000001F1000000E1D43831DF.png" xlink:type="simple" xlink:show="embed" xlink:actuate="onLoad" draw:mime-type="image/png"/></draw:frame></text:p>
      <text:p text:style-name="P12"/>
      <text:p text:style-name="P13"/>
      <text:p text:style-name="P14"><text:soft-page-break/>Pie Chart:</text:p>
      <text:p text:style-name="P15">Now lets see pie chart it uses the frequency approach just like the bar graph but here we use the percentage occurrence approach.</text:p>
      <text:p text:style-name="P15"/>
      <text:p text:style-name="P15">Lets take a look on the frequency of the fruits data lets see that but the twist is that we will be converting those numeric data into percentage.</text:p>
      <text:p text:style-name="P15"/>
      <text:p text:style-name="P15">Formula→ <text:span text:style-name="T2">No.Of Frequency * 100</text:span><text:span text:style-name="T3"><text:tab/></text:span><text:tab/><text:tab/><text:tab/><text:tab/><text:tab/> <text:s text:c="3"/><text:tab/><text:tab/>Total No Of Fruits Frequency</text:p>
      <text:p text:style-name="P15"/>
      <text:p text:style-name="P15">Mathematical calculations are done in the register please refer to that</text:p>
      <text:p text:style-name="P15"/>
      <text:p text:style-name="P15">Apple → 42.9%</text:p>
      <text:p text:style-name="P15">Banana → 28.6%</text:p>
      <text:p text:style-name="P15">Kiwi → 14.3%</text:p>
      <text:p text:style-name="P15">Mango → 14.3%</text:p>
      <text:p text:style-name="P14"/>
      <text:p text:style-name="P15">For creation of the pie chart in the back-end a circle is created then it is divided with the percentage data that we have calculated and ultimately something like this is made:</text:p>
      <text:p text:style-name="P15"><draw:frame draw:style-name="fr2" draw:name="Image4" text:anchor-type="char" svg:x="1.5437in" svg:y="0.1307in" svg:width="3.5492in" svg:height="3.4516in" draw:z-index="3"><draw:image xlink:href="Pictures/100000010000018E00000183C87A9BC6.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text:soft-page-break/>Line Graph:</text:p>
      <text:p text:style-name="P17">Line graph are interesting but for making it we need to look backwards towards bar graph.</text:p>
      <text:p text:style-name="P17"><draw:frame draw:style-name="fr2" draw:name="Image5" text:anchor-type="char" svg:x="3.5547in" svg:y="0.1673in" svg:width="3.7165in" svg:height="2.4917in" draw:z-index="4"><draw:image xlink:href="Pictures/10000001000001BE0000012B0EE9DB44.png" xlink:type="simple" xlink:show="embed" xlink:actuate="onLoad" draw:mime-type="image/png"/></draw:frame></text:p>
      <text:p text:style-name="P17">For understanding lets look at the bar graph we created now lets add dots on the top of the bars and connect them.</text:p>
      <text:p text:style-name="P17"/>
      <text:p text:style-name="P17"/>
      <text:p text:style-name="P17"/>
      <text:p text:style-name="P17"/>
      <text:p text:style-name="P17"/>
      <text:p text:style-name="P17"/>
      <text:p text:style-name="P17"><draw:frame draw:style-name="fr2" draw:name="Image6" text:anchor-type="char" svg:x="3.5882in" svg:y="0.1008in" svg:width="3.7165in" svg:height="2.4917in" draw:z-index="5"><draw:image xlink:href="Pictures/10000001000001BE0000012B0A3E2C15.png" xlink:type="simple" xlink:show="embed" xlink:actuate="onLoad" draw:mime-type="image/png"/></draw:frame></text:p>
      <text:p text:style-name="P17">After that remove the bars boom here we go we got our very own line graph.</text:p>
      <text:p text:style-name="P17"/>
      <text:p text:style-name="P17"/>
      <text:p text:style-name="P17"/>
      <text:p text:style-name="P17"/>
      <text:p text:style-name="P17"/>
      <text:p text:style-name="P17"/>
      <text:p text:style-name="P17"/>
      <text:p text:style-name="P17"/>
      <text:p text:style-name="P17"/>
      <text:p text:style-name="P18">Question: Now when to use bar graph and when to use line graph??</text:p>
      <text:p text:style-name="P18"/>
      <text:p text:style-name="P18">Answer: <text:span text:style-name="T4">To explain this we will be using a data of monthly expenses.</text:span></text:p>
      <text:p text:style-name="P17">Here u can see we cant calculate the frequency of the data here but we can only plot a simple bar graph which cant show the flow. In short we will use bar graph when we have frequency of data and line graph we will be using when we have to see <text:s/>a trend like here I am attaching the picture of the line graph that will be made for this data which is attached on the next page.</text:p>
      <text:p text:style-name="P17"/>
      <text:p text:style-name="P17"/>
      <text:p text:style-name="P17"/>
      <text:p text:style-name="P17"><text:soft-page-break/></text:p>
      <text:p text:style-name="P19"><draw:frame draw:style-name="fr2" draw:name="Image8" text:anchor-type="char" svg:x="0.0591in" svg:y="0.3917in" svg:width="2.1252in" svg:height="4.6083in" draw:z-index="6"><draw:image xlink:href="Pictures/10000001000000FF000002297D001C4B.png" xlink:type="simple" xlink:show="embed" xlink:actuate="onLoad" draw:mime-type="image/png"/></draw:frame>Data <text:s text:c="32"/>Line Graph</text:p>
      <text:p text:style-name="P20"><draw:frame draw:style-name="fr2" draw:name="Image7" text:anchor-type="char" svg:x="2.7299in" svg:y="0.0835in" svg:width="3.5335in" svg:height="2.4571in" draw:z-index="7"><draw:image xlink:href="Pictures/10000001000002520000019D73C130F8.png" xlink:type="simple" xlink:show="embed" xlink:actuate="onLoad" draw:mime-type="image/png"/></draw:frame><text:s text:c="49"/></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1">Here we can see it showing the flow of trend like the expenses flow from month 1 to month 12 this is the core reason to create a line graph.</text:p>
      <text:p text:style-name="P20"/>
      <text:p text:style-name="P20"/>
      <text:p text:style-name="P20"/>
      <text:p text:style-name="P20"/>
      <text:p text:style-name="P20"/>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O-Gives:</text:p>
      <text:p text:style-name="P23">To create an o-gives we have to take out cumulative frequencies.</text:p>
      <text:p text:style-name="P23">So now what is cumulative frequencies lets calculate what is it:</text:p>
      <text:p text:style-name="P23"/>
      <text:p text:style-name="P23"><text:span text:style-name="T1">Cumulative Frequencies </text:span>→ I have attached the table below now the situation is that we create 2 tables one is of the default expenses and the next table is we will be adding per month expense like in Jan we have 10k expenses and for Feb we have 12k expenses and for march we have 20k expenses now we have the data for the cumulative frequency table we will be doing like this. For Ja<text:span text:style-name="T5">n</text:span> it stays the same as 10k and for Feb it will now be 22k (10k of Jan + 12k of Feb) and for march it will now be 42k <text:tab/> <text:s/><text:tab/> (10k of Jan + 12k of Feb + 20k of Mar).</text:p>
      <text:p text:style-name="P23"><draw:frame draw:style-name="fr2" draw:name="Image9" text:anchor-type="char" svg:x="0.0457in" svg:y="0.0543in" svg:width="4.522in" svg:height="3.8602in" draw:z-index="8"><draw:image xlink:href="Pictures/10000001000003650000032290A0B79F.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Now the line graph that will be plotted on the basis of <draw:frame draw:style-name="fr2" draw:name="Image10" text:anchor-type="char" svg:x="2.9583in" svg:y="0.2575in" svg:width="4.4516in" svg:height="2.5126in" draw:z-index="9"><draw:image xlink:href="Pictures/10000001000003E7000002348E2DFB15.png" xlink:type="simple" xlink:show="embed" xlink:actuate="onLoad" draw:mime-type="image/png"/></draw:frame>cumulative frequencies will be known as O-Gives.</text:p>
      <text:p text:style-name="P24">Which is drawn here→</text:p>
      <text:p text:style-name="P24"/>
      <text:p text:style-name="P20"/>
      <text:p text:style-name="P20"/>
      <text:p text:style-name="P25"/>
      <text:p text:style-name="P25"/>
      <text:p text:style-name="P26"><text:s text:c="19"/><text:span text:style-name="T6"/></text:p>
      <text:p text:style-name="P27"><text:soft-page-break/><text:span text:style-name="T7">Two Way Table:</text:span></text:p>
      <text:p text:style-name="P28"><text:s/></text:p>
      <text:p text:style-name="P28"><text:span text:style-name="T8">Currently the table we have on the right is a one way table. Lets assume this table is of data of the period of revenue of 4 years like from 2020-2023 now we can break it down as follows because we don’t have seperate data of each year we only have a c</text:span><draw:frame draw:style-name="fr2" draw:name="Image11" text:anchor-type="char" svg:x="-0.35in" svg:y="1.2118in" svg:width="2.2681in" svg:height="2.4992in" draw:z-index="10"><draw:image xlink:href="Pictures/10000001000001740000019A42CB35C1.png" xlink:type="simple" xlink:show="embed" xlink:actuate="onLoad" draw:mime-type="image/png"/></draw:frame><text:span text:style-name="T8">ombined data</text:span> <text:span text:style-name="T8">so we will break it down as follows:</text:span></text:p>
      <text:p text:style-name="P28"><draw:frame draw:style-name="fr2" draw:name="Image12" text:anchor-type="char" svg:x="2.5508in" svg:y="0.0083in" svg:width="4.9256in" svg:height="2.2484in" draw:z-index="11"><draw:image xlink:href="Pictures/10000001000002C1000001280F38401E.png" xlink:type="simple" xlink:show="embed" xlink:actuate="onLoad" draw:mime-type="image/png"/></draw:frame><text:s text:c="26"/></text:p>
      <text:p text:style-name="P28"/>
      <text:p text:style-name="P28"/>
      <text:p text:style-name="P28"/>
      <text:p text:style-name="P28"/>
      <text:p text:style-name="P28"/>
      <text:p text:style-name="P28"/>
      <text:p text:style-name="P28"/>
      <text:p text:style-name="P28"/>
      <text:p text:style-name="P28"/>
      <text:p text:style-name="P29">now this is a two way table because now month is not only the independent thing like if someone asks a revenue from us we will be asking two questions like for which month and which year. Dependencies has switched from a single month to a year too. Now if someone asks us when was the revenue 35k we can tell them it was in the year 2021 in the month of May.</text:p>
      <text:p text:style-name="P28"/>
      <text:p text:style-name="P28"><text:span text:style-name="T8">Now using this data we can create a line graph for each year. </text:span><text:span text:style-name="T9">Or even a bar graph for each year</text:span></text:p>
      <text:p text:style-name="P28"><draw:frame draw:style-name="fr2" draw:name="Image13" text:anchor-type="char" svg:x="0.5508in" svg:y="0.0665in" svg:width="6.1091in" svg:height="2.2917in" draw:z-index="12"><draw:image xlink:href="Pictures/10000001000001E000000113A4943405.png" xlink:type="simple" xlink:show="embed" xlink:actuate="onLoad" draw:mime-type="image/png"/></draw:frame></text:p>
      <text:p text:style-name="P28"><text:s text:c="21"/></text:p>
      <text:p text:style-name="P28"/>
      <text:p text:style-name="P28"/>
      <text:p text:style-name="P30"/>
      <text:p text:style-name="P31"><text:soft-page-break/>In 2 way table there is a thing known as <text:span text:style-name="T1">Dot Plot </text:span>its basically a bar graph with dots stacked on each other. To create that we basically need frequency of specific data which fulfill the need.</text:p>
      <text:p text:style-name="P31">Which needs data like this <text:s/>→</text:p>
      <text:p text:style-name="P31">It helps to build understanding for histogram.</text:p>
      <text:p text:style-name="P31"><draw:frame draw:style-name="fr2" draw:name="Image14" text:anchor-type="char" svg:x="0.0465in" svg:y="0.1189in" svg:width="2.8335in" svg:height="2.8665in" draw:z-index="13"><draw:image xlink:href="Pictures/10000001000001540000015850258742.png" xlink:type="simple" xlink:show="embed" xlink:actuate="onLoad" draw:mime-type="image/png"/></draw:frame><draw:frame draw:style-name="fr2" draw:name="Image15" text:anchor-type="char" svg:x="3.7134in" svg:y="0.4165in" svg:width="2.8335in" svg:height="1.4252in" draw:z-index="14"><draw:image xlink:href="Pictures/1000000100000154000000AB74C911DB.png" xlink:type="simple" xlink:show="embed" xlink:actuate="onLoad" draw:mime-type="image/png"/></draw:frame><text:s text:c="7"/></text:p>
      <text:p text:style-name="P31"/>
      <text:p text:style-name="P31"/>
      <text:p text:style-name="P31"/>
      <text:p text:style-name="P31"/>
      <text:p text:style-name="P31"/>
      <text:p text:style-name="P31"/>
      <text:p text:style-name="P31"/>
      <text:p text:style-name="P31"/>
      <text:p text:style-name="P32"><text:tab/><text:tab/><text:tab/>Dot Plot of the data</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3"><text:soft-page-break/>Relative Frequency Table:</text:p>
      <text:p text:style-name="P31">A relative frequency table can be made through both one way and two way table but most of the data we see around is two way so we will focus on that</text:p>
      <text:p text:style-name="P31"/>
      <text:p text:style-name="P31"><draw:frame draw:style-name="fr1" draw:name="Image16" text:anchor-type="char" svg:width="4.9154in" svg:height="2.0417in" draw:z-index="15"><draw:image xlink:href="Pictures/10000001000002B5000000F5E40D765D.png" xlink:type="simple" xlink:show="embed" xlink:actuate="onLoad" draw:mime-type="image/png"/></draw:frame>Data→</text:p>
      <text:p text:style-name="P31"/>
      <text:p text:style-name="P31"/>
      <text:p text:style-name="P31"/>
      <text:p text:style-name="P31"/>
      <text:p text:style-name="P31"/>
      <text:p text:style-name="P31"/>
      <text:p text:style-name="P31"/>
      <text:p text:style-name="P32"/>
      <text:p text:style-name="P34">(its a two way table because there is dependencies on two things the color and the flower like if someone asks us where is 20 so u will be telling them in red column and rose rows something like that I hope u got my point)</text:p>
      <text:p text:style-name="P34"/>
      <text:p text:style-name="P35">Now lets calculate the column frequency of the data for which we will be calculating the frequency from 100. (<text:span text:style-name="T1">For detailed calculations refer to the notebook we have done calculations there</text:span>)</text:p>
      <text:p text:style-name="P36"><draw:frame draw:style-name="fr1" draw:name="Image17" text:anchor-type="char" svg:width="5.6083in" svg:height="1.9827in" draw:z-index="16"><draw:image xlink:href="Pictures/10000001000002B5000000F59447C3E4.png" xlink:type="simple" xlink:show="embed" xlink:actuate="onLoad" draw:mime-type="image/png"/></draw:frame>the white ones are different its due to a mathematical error u can see the notebook for instance.</text:p>
      <text:p text:style-name="P36">Formula for calculating→ <text:span text:style-name="T2">No. of An Element*100</text:span></text:p>
      <text:p text:style-name="P37"><text:s text:c="30"/><text:span text:style-name="T10">Total Number <text:s text:c="41"/></text:span></text:p>
      <text:p text:style-name="P36">We have calculated the column frequency so if we total the column frequency we will be getting 100% but not for rows. Fortunately we can also calculate row related frequencies.</text:p>
      <text:p text:style-name="P36"/>
      <text:p text:style-name="P38">We do this because in Machine Learning We Mostly need to convert numeric data into 0s and 1</text:p>
      <text:p text:style-name="P38"><text:soft-page-break/></text:p>
      <text:p text:style-name="P39">Joint Distribution:</text:p>
      <text:p text:style-name="P36">A joint distribution table is similar to relative frequency table as it also contains percentage. This table compares two different distributions in a single table.</text:p>
      <text:p text:style-name="P36"><draw:frame draw:style-name="fr1" draw:name="Image18" text:anchor-type="char" svg:width="6.2083in" svg:height="4.0252in" draw:z-index="17"><draw:image xlink:href="Pictures/10000001000002E9000001E3278CF33D.png" xlink:type="simple" xlink:show="embed" xlink:actuate="onLoad" draw:mime-type="image/png"/></draw:frame>So we can say if we join 2 way tables and we use percentage and total percentage comes at 100% this is called as joint distribution.</text:p>
      <text:p text:style-name="P36"/>
      <text:p text:style-name="P36"><text:s/></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0"><text:soft-page-break/>Histogram:</text:p>
      <text:p text:style-name="P41">Histogram looks actually like a bar graph but here we group the data into buckets or bins.<draw:frame draw:style-name="fr2" draw:name="Image19" text:anchor-type="char" svg:x="4.1425in" svg:y="0.3846in" svg:width="3.2252in" svg:height="2.7335in" draw:z-index="18"><draw:image xlink:href="Pictures/10000001000001830000014821FA04B3.png" xlink:type="simple" xlink:show="embed" xlink:actuate="onLoad" draw:mime-type="image/png"/></draw:frame></text:p>
      <text:p text:style-name="P41">We will be seeing using this data→</text:p>
      <text:p text:style-name="P41"/>
      <text:p text:style-name="P41">This data is incomplete it has multiple rows but for adding this here we are using only this data.</text:p>
      <text:p text:style-name="P41"/>
      <text:p text:style-name="P41"/>
      <text:p text:style-name="P41"/>
      <text:p text:style-name="P41"/>
      <text:p text:style-name="P41"/>
      <text:p text:style-name="P41"/>
      <text:p text:style-name="P41"/>
      <text:p text:style-name="P41">Now for making histogram we will be using x-axis and we will be creating bins just like this:</text:p>
      <text:p text:style-name="P41"><draw:frame draw:style-name="fr2" draw:name="Image20" text:anchor-type="char" svg:x="0.0382in" svg:y="0in" svg:width="3.7165in" svg:height="0.5917in" draw:z-index="19"><draw:image xlink:href="Pictures/10000001000001BE00000047B1DE7FBA.png" xlink:type="simple" xlink:show="embed" xlink:actuate="onLoad" draw:mime-type="image/png"/></draw:frame>these bins are created using range function :).</text:p>
      <text:p text:style-name="P41"><draw:frame draw:style-name="fr2" draw:name="Image21" text:anchor-type="char" svg:x="4.7508in" svg:y="0.2181in" svg:width="3.2583in" svg:height="0.5335in" draw:z-index="20"><draw:image xlink:href="Pictures/10000001000001870000004005F05F85.png" xlink:type="simple" xlink:show="embed" xlink:actuate="onLoad" draw:mime-type="image/png"/></draw:frame></text:p>
      <text:p text:style-name="P41">Now these bins we put the candidate into their desired bins using their age. Just like the image I have attached→</text:p>
      <text:p text:style-name="P41"><draw:frame draw:style-name="fr2" draw:name="Image22" text:anchor-type="char" svg:x="3.5134in" svg:y="0.1425in" svg:width="3.5in" svg:height="1.5835in" draw:z-index="21"><draw:image xlink:href="Pictures/10000001000001A4000000BE418F687D.png" xlink:type="simple" xlink:show="embed" xlink:actuate="onLoad" draw:mime-type="image/png"/></draw:frame></text:p>
      <text:p text:style-name="P41">The more the number of data in the bins the more tall the histogram becomes</text:p>
      <text:p text:style-name="P41"/>
      <text:p text:style-name="P41"/>
      <text:p text:style-name="P41"/>
      <text:p text:style-name="P41"/>
      <text:p text:style-name="P42">Now lets work on actual data</text:p>
      <text:p text:style-name="P42"><draw:frame draw:style-name="fr3" draw:name="Image23" text:anchor-type="char" svg:width="6.6929in" svg:height="1.0898in" draw:z-index="22"><draw:image xlink:href="Pictures/10000001000003680000008ED1CC5314.png" xlink:type="simple" xlink:show="embed" xlink:actuate="onLoad" draw:mime-type="image/png"/></draw:frame>Now lets calculate the range of this to calculate the range we use the formula → <text:span text:style-name="T1">Range = Rmax-Rmin</text:span></text:p>
      <text:p text:style-name="P42">here max is 24 and min is 3 so range is 21</text:p>
      <text:p text:style-name="P42">For creating bins we usually have to play around like here we can do is divide the range with 6 21/6 = 3.5.</text:p>
      <text:p text:style-name="P42"><text:soft-page-break/>For safe side we will round it of to 4 and the bins we will have is.</text:p>
      <text:p text:style-name="P42">1-5,6-10,11-15,1<text:span text:style-name="T11">6</text:span>-20,21-25</text:p>
      <text:p text:style-name="P42"><draw:frame draw:style-name="fr2" draw:name="Image24" text:anchor-type="char" svg:x="-0.0583in" svg:y="0.002in" svg:width="6.6929in" svg:height="3.0756in" draw:z-index="23"><draw:image xlink:href="Pictures/10000001000003870000019F25817216.png" xlink:type="simple" xlink:show="embed" xlink:actuate="onLoad" draw:mime-type="image/png"/></draw:frame></text:p>
      <text:p text:style-name="P43">Question: Why and When we use Histogram?</text:p>
      <text:p text:style-name="P44"><text:span text:style-name="T12">Answer: </text:span><text:span text:style-name="T13">We use Histogram when we have quantitative data</text:span>,<text:span text:style-name="T14"> and we use it to group that data into buckets called bins so we can see the shape or spread at a glance like whether most values are clustered together, spread out evenly, or piled up on one side instead of having to read through a long list of raw numbers to figure that out.</text:span></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6"><text:soft-page-break/>DATA ANALYZING</text:p>
      <text:p text:style-name="P43"/>
      <text:p text:style-name="P43"/>
      <text:p text:style-name="P47">In this section we will be focusing how we can do things mathematically to better understand our data</text:p>
      <text:p text:style-name="P48"/>
      <text:p text:style-name="P49">Measure Of Central Tendency:</text:p>
      <text:p text:style-name="P50">It means it is the way we can describe the middle part of our data. The importance of middle part of the data we will see it further in the course why is it this much important.</text:p>
      <text:p text:style-name="P50"/>
      <text:p text:style-name="P51">Mean →<text:span text:style-name="T4"> The first way to find the middle part of the data is mean. It is also known as average.</text:span></text:p>
      <text:p text:style-name="P51"/>
      <text:p text:style-name="P50"><text:span text:style-name="T1">Example →</text:span> Here we have data 1,2,3,4,5. Here 3 is the middle part because its continuous data like equal spacing between elements.</text:p>
      <text:p text:style-name="P50"/>
      <text:p text:style-name="P50">But when it comes to non continuous data lets see it. Here we have data 2,2,7,9,10.</text:p>
      <text:p text:style-name="P50"/>
      <text:p text:style-name="P51">Formula → <text:span text:style-name="T4">Sum of all numbers / total numbers</text:span></text:p>
      <text:p text:style-name="P50"/>
      <text:p text:style-name="P50">Mean = 6 for the non continuous data refer to the notebook for detailed calculation</text:p>
      <text:p text:style-name="P52"><draw:frame draw:style-name="fr4" draw:name="Image25" text:anchor-type="char" svg:width="1.8665in" svg:height="1.1583in" draw:z-index="24"><draw:image xlink:href="Pictures/10000001000000E00000008B852113A3.png" xlink:type="simple" xlink:show="embed" xlink:actuate="onLoad" draw:mime-type="image/png"/></draw:frame>Fancy representation of this formula is statistic →</text:p>
      <text:p text:style-name="P52">Details of this are mentioned in notebook</text:p>
      <text:p text:style-name="P53"/>
      <text:p text:style-name="P53">Median → <text:span text:style-name="T4">The second way to find the middle part of the data. It doesn’t neccesarily need to be calculated through mathematical formulae it is simple.</text:span></text:p>
      <text:p text:style-name="P52"/>
      <text:p text:style-name="P53">Example → <text:span text:style-name="T4">4,7,9,10 The middle part of this data is 7 and 9 so we will add them both and divide them by 2 we will get 8 and 8 will be the middle point of this data.</text:span></text:p>
      <text:p text:style-name="P52">Another example 1,2,6,7,9 no need for calculation here we can exactly see that 6 is the midpoint like on the left of 6 we have <text:soft-page-break/>2 elements and on the right too we have 2 elements so 6 automatically becomes the midpoint.</text:p>
      <text:p text:style-name="P50"><text:s/></text:p>
      <text:p text:style-name="P54">Mode→ <text:span text:style-name="T4">It is the most simplest one. Mode is the most repeated element in the data.</text:span></text:p>
      <text:p text:style-name="P55"/>
      <text:p text:style-name="P54">Example→ <text:span text:style-name="T4">2,2,5,6,7,8,10,10,10 Here we can clearly see 10 is the most repeated value in the data hence 10 is the mode of this data.</text:span></text:p>
      <text:p text:style-name="P55"/>
      <text:p text:style-name="P55">Now for suppose we have data 1,2,4,5 we can not take out mode from this as there is no repeated value in this data. On the other hand we have this type of data 1,1,1,2,3,4,5,5,5,6,7 in this data we have 2 repeated values which are 1 and 5 so this becomes a case of <text:span text:style-name="T1">bimodal</text:span> even if there are 4 and 5 number of modes this lies in the case of <text:span text:style-name="T1">bimodal.</text:span></text:p>
      <text:p text:style-name="P54"/>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6"><text:soft-page-break/>M<text:span text:style-name="T15">easure</text:span> O<text:span text:style-name="T15">f</text:span> S<text:span text:style-name="T15">pread</text:span>:</text:p>
      <text:p text:style-name="P55">It means how much and how are data spread around its center. Its different from what we have seen above.</text:p>
      <text:p text:style-name="P55">It means in simple words how much your data is spread from the central point.</text:p>
      <text:p text:style-name="P55">We will be talking about<text:span text:style-name="T1"> Range, IQR (Interquartile range) and Standard Deviation </text:span>as they are also measure of spread. But here we will be covering <text:span text:style-name="T1">Range and IQR</text:span> for now <text:span text:style-name="T16">and </text:span><text:span text:style-name="T17">variance and std deviation</text:span><text:span text:style-name="T16"> are part too but we will discuss them later.</text:span></text:p>
      <text:p text:style-name="P55"/>
      <text:p text:style-name="P57">Range:</text:p>
      <text:p text:style-name="P58">To find the range we subtract the maximum value in the data with the minimum value in the data doing this we get Range.</text:p>
      <text:p text:style-name="P59"><text:span text:style-name="T16">F</text:span>ormula → <text:span text:style-name="T1">Range = Rmax-Rmin.</text:span></text:p>
      <text:p text:style-name="P58">Range tells us the distribution of data how and in what range they are distributed.</text:p>
      <text:p text:style-name="P58"><draw:frame draw:style-name="fr2" draw:name="Image26" text:anchor-type="char" svg:x="0.2547in" svg:y="0.0417in" svg:width="3.95in" svg:height="1.0752in" draw:z-index="25"><draw:image xlink:href="Pictures/10000001000001DA000000814A583CCA.png" xlink:type="simple" xlink:show="embed" xlink:actuate="onLoad" draw:mime-type="image/png"/></draw:frame></text:p>
      <text:p text:style-name="P60">Refer to the diagram suppose u have data and in the center u have the mean or your center data and on the right and left u have ur highest value and the lowwest value we can see how close or how far these values are to check how spreaded the data is between them.</text:p>
      <text:p text:style-name="P55"/>
      <text:p text:style-name="P61">Interquartile Range(IQR):</text:p>
      <text:p text:style-name="P60">Before moving towards Interquartile we first need to understand what are Quartiles. Because in IQR we will be measuring the distance between one quarter and another quarter of our data.</text:p>
      <text:p text:style-name="P62">There are mostly 3 types of percentile and sometimes 4 types of percentile.</text:p>
      <text:p text:style-name="P63">Q1-25% <text:span text:style-name="T4">Percentile</text:span></text:p>
      <text:p text:style-name="P63">Q2-50% <text:span text:style-name="T4">Percentile</text:span></text:p>
      <text:p text:style-name="P63">Q3-75% <text:span text:style-name="T4">Percentile</text:span></text:p>
      <text:p text:style-name="P63">Q4-100% <text:span text:style-name="T4">Percentile</text:span></text:p>
      <text:p text:style-name="P62"/>
      <text:p text:style-name="P63">Percentile means<text:span text:style-name="T4"> the percentage of data that lies below a specific value.</text:span></text:p>
      <text:p text:style-name="P62">To understand this better let see a data we have a data</text:p>
      <text:p text:style-name="P62">12,12,13,14,15,17,20,20,28,29,31,35,46,46,48,51,59,60</text:p>
      <text:p text:style-name="P62"><text:soft-page-break/></text:p>
      <text:p text:style-name="P62"><draw:frame draw:style-name="fr4" draw:name="Image27" text:anchor-type="char" svg:width="6.4083in" svg:height="1.2in" draw:z-index="26"><draw:image xlink:href="Pictures/1000000100000301000000902ADBB0B1.png" xlink:type="simple" xlink:show="embed" xlink:actuate="onLoad" draw:mime-type="image/png"/></draw:frame><text:s/></text:p>
      <text:p text:style-name="P62">We can calculate Q1,Q2,Q3 by dividing the data into two parts like in the data we have 18 elements we can divide them into 9 9 parts for which then we can calculate the data. For the calculating Q1 we can see the 5<text:span text:style-name="T18">th</text:span> value of the data that will be Q1 for the Q2 we can do is divide the 9<text:span text:style-name="T18">th</text:span> and 10<text:span text:style-name="T18">th</text:span> element and we can get Q2 which exactly means the mean of the data. And for Q3 we will do the same thing but with the second part of the data choosing the 5<text:span text:style-name="T18">th</text:span> value of the data it will be Q3.</text:p>
      <text:p text:style-name="P62"/>
      <text:p text:style-name="P62"><draw:frame draw:style-name="fr4" draw:name="Image28" text:anchor-type="char" svg:width="6.4752in" svg:height="3.0417in" draw:z-index="27"><draw:image xlink:href="Pictures/10000001000003090000016DCF9C16F4.png" xlink:type="simple" xlink:show="embed" xlink:actuate="onLoad" draw:mime-type="image/png"/></draw:frame></text:p>
      <text:p text:style-name="P64">Now to find IQR we just have to subtract Q1 From Q3 46-15 = 31.</text:p>
      <text:p text:style-name="P64">So if the IQR is low it means the data is close to the median if the IQR is high it means the data is highly spread from the center.</text:p>
      <text:p text:style-name="P55"/>
      <text:p text:style-name="P55"/>
      <text:p text:style-name="P55"/>
      <text:p text:style-name="P55"/>
      <text:p text:style-name="P55"/>
      <text:p text:style-name="P55"/>
      <text:p text:style-name="P55"/>
      <text:p text:style-name="P55"><text:soft-page-break/></text:p>
      <text:p text:style-name="P65">Outliers:</text:p>
      <text:p text:style-name="P66">To understand outliers we need to look at an example of data first only in that way we can understand what really outliers are</text:p>
      <text:p text:style-name="P66">1,2,4,7,9,10,101.</text:p>
      <text:p text:style-name="P66">Lets find the central tendency of this data we will be using mean and median since we cant use mode because there are no repeated values.</text:p>
      <text:p text:style-name="P66">Mean → 1+2+4+7+9+10+101 = 134/7 → 19.4</text:p>
      <text:p text:style-name="P66">Median → <text:span text:style-name="T19">1,2,4</text:span>,7,<text:span text:style-name="T19">9,10,101</text:span> = 7</text:p>
      <text:p text:style-name="P66"/>
      <text:p text:style-name="P66">Here u can see how much big difference there is between the mean and median its due to an outlier (101) and if we remove that mean and median would be very close then.</text:p>
      <text:p text:style-name="P66"/>
      <text:p text:style-name="P66">Outliers damage our data by:</text:p>
      <text:list text:style-name="L1">
        <text:list-item>
          <text:p text:style-name="P67">They distort measures like mean and standard deviation making them less representative to the given data.</text:p>
        </text:list-item>
        <text:list-item>
          <text:p text:style-name="P67">In machine learning especially in regression models outliers can disproportionately influence the model leading to poor generalization.</text:p>
        </text:list-item>
        <text:list-item>
          <text:p text:style-name="P68">Outliers impact our model performance our statistical testing and many other thing so we have to get rid from them.</text:p>
        </text:list-item>
      </text:list>
      <text:p text:style-name="P69">So now to get rid of outliers we use the upper and lower fence approach in our data by that we can get rid of them.</text:p>
      <text:p text:style-name="P70"><draw:frame draw:style-name="fr4" draw:name="Image29" text:anchor-type="char" svg:width="5.9083in" svg:height="1.15in" draw:z-index="28"><draw:image xlink:href="Pictures/10000001000002C50000008AAE93222E.png" xlink:type="simple" xlink:show="embed" xlink:actuate="onLoad" draw:mime-type="image/png"/></draw:frame><text:span text:style-name="T20">The points that show linking between them is the point till we consider our data after the end line no data will be considered.</text:span></text:p>
      <text:p text:style-name="P70"/>
      <text:p text:style-name="P70"/>
      <text:p text:style-name="P70"/>
      <text:p text:style-name="P70"><draw:frame draw:style-name="fr4" draw:name="Image30" text:anchor-type="char" svg:width="5.9252in" svg:height="2.1583in" draw:z-index="29"><draw:image xlink:href="Pictures/10000001000002C700000103910FC4F7.png" xlink:type="simple" xlink:show="embed" xlink:actuate="onLoad" draw:mime-type="image/png"/></draw:frame><text:soft-page-break/><text:s/></text:p>
      <text:p text:style-name="P69">(Mathematical calculation done is notebook)</text:p>
      <text:p text:style-name="P69"/>
      <text:p text:style-name="P71">To find upper and lower fence we have Formula to calculate each fence.</text:p>
      <text:p text:style-name="P71"/>
      <text:p text:style-name="P71">Upper Fence → Q<text:span text:style-name="T11">3+</text:span>1.5(IQR)</text:p>
      <text:p text:style-name="P71"/>
      <text:p text:style-name="P71">Lower Fence → Q<text:span text:style-name="T11">1</text:span>-1.5(IQR)</text:p>
      <text:p text:style-name="P71"/>
      <text:p text:style-name="P71">For this example we got this after calculations</text:p>
      <text:p text:style-name="P71"/>
      <text:p text:style-name="P71">IQR = 7</text:p>
      <text:p text:style-name="P71">Q1 = 4</text:p>
      <text:p text:style-name="P71">Q3 = 11</text:p>
      <text:p text:style-name="P71"/>
      <text:p text:style-name="P71">Upper Fence → 21.5</text:p>
      <text:p text:style-name="P71"/>
      <text:p text:style-name="P71">Lower Fence → -6.5</text:p>
      <text:p text:style-name="P71"/>
      <text:p text:style-name="P71">We have to check whether there is any value below lower fence or any value above the upper fence if those exists they are outliers.</text:p>
      <text:p text:style-name="P71"/>
      <text:p text:style-name="P71"/>
      <text:p text:style-name="P71"/>
      <text:p text:style-name="P71"/>
      <text:p text:style-name="P71"/>
      <text:p text:style-name="P71"/>
      <text:p text:style-name="P71"/>
      <text:p text:style-name="P71"/>
      <text:p text:style-name="P71"/>
      <text:p text:style-name="P72"><text:soft-page-break/>5 Number Summary:</text:p>
      <text:p text:style-name="P73">The 5 number summary is prepared after removing outliers from the data it is a statistical summary used to describe the distribution of a dataset. It provides a quick overview of the data’s spread and center and it includes the following values:</text:p>
      <text:list text:style-name="L2">
        <text:list-item>
          <text:p text:style-name="P74">Minimum</text:p>
        </text:list-item>
        <text:list-item>
          <text:p text:style-name="P74">First Quartiles (Q1)</text:p>
        </text:list-item>
        <text:list-item>
          <text:p text:style-name="P74">Median (Q2)</text:p>
        </text:list-item>
        <text:list-item>
          <text:p text:style-name="P74">Third Quartiles (Q3)</text:p>
        </text:list-item>
        <text:list-item>
          <text:p text:style-name="P74">Maximum</text:p>
        </text:list-item>
      </text:list>
      <text:p text:style-name="P73">Lets work with data</text:p>
      <text:p text:style-name="P75">2,4,7,10,15,20,25,205 calculations done in notebook</text:p>
      <text:p text:style-name="P76">Data after doing calculations</text:p>
      <text:p text:style-name="P77">Q1 = 5.5,Q2 = 12.5,Q3 = 22.5,IQR = 17,UF = 48,LF = -20</text:p>
      <text:p text:style-name="P75"/>
      <text:p text:style-name="P78">Preparing 5 Number Summary <text:span text:style-name="T21">After Removing Outliers</text:span></text:p>
      <text:p text:style-name="P78">Min →<text:span text:style-name="T4"> 2</text:span></text:p>
      <text:p text:style-name="P78">Q1<text:span text:style-name="T4"> </text:span>→ <text:span text:style-name="T22">4</text:span></text:p>
      <text:p text:style-name="P78">Q2 → <text:span text:style-name="T4">1</text:span><text:span text:style-name="T22">0</text:span></text:p>
      <text:p text:style-name="P78">Q3 → <text:span text:style-name="T4">2</text:span><text:span text:style-name="T22">0</text:span></text:p>
      <text:p text:style-name="P78">Max → <text:span text:style-name="T4">25</text:span></text:p>
      <text:p text:style-name="P79"/>
      <text:p text:style-name="P80"><draw:frame draw:style-name="fr4" draw:name="Image31" text:anchor-type="char" svg:width="5.8583in" svg:height="4.8665in" draw:z-index="30"><draw:image xlink:href="Pictures/10000001000002BF00000248F9604F61.png" xlink:type="simple" xlink:show="embed" xlink:actuate="onLoad" draw:mime-type="image/png"/></draw:frame><text:soft-page-break/>This summary is used for plotting box plots u will understand better when u will see data visualization.</text:p>
      <text:p text:style-name="P81">(We have also implemented Code for outliers too see In the repositor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omic Relief" svg:font-family="'Comic Relief'"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7-15T13:02:00.535655027</meta:creation-date>
    <dc:date>2026-07-16T17:04:15.733034839</dc:date>
    <meta:editing-duration>PT17M31S</meta:editing-duration>
    <meta:editing-cycles>3</meta:editing-cycles>
    <meta:generator>LibreOffice/26.2.4.2$Linux_X86_64 LibreOffice_project/620$Build-2</meta:generator>
    <meta:document-statistic meta:table-count="2" meta:image-count="31" meta:object-count="0" meta:page-count="21" meta:paragraph-count="183" meta:word-count="2731" meta:character-count="14595" meta:non-whitespace-character-count="11787"/>
  </office:meta>
</office:document-meta>
</file>